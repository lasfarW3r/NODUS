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D3000002FFCD936681.png" manifest:media-type="image/png"/>
  <manifest:file-entry manifest:full-path="Pictures/100000000000026C000001598D07F4E0.png" manifest:media-type="image/png"/>
  <manifest:file-entry manifest:full-path="Pictures/100000010000012E000001AF27336452.png" manifest:media-type="image/png"/>
  <manifest:file-entry manifest:full-path="Pictures/100000010000041700000132900AE2AF.png" manifest:media-type="image/png"/>
  <manifest:file-entry manifest:full-path="Pictures/10000001000005B6000002451DBE409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2.7cm" fo:margin-top="0cm" fo:margin-bottom="0cm" table:align="center" style:writing-mode="page"/>
    </style:style>
    <style:style style:name="Tableau1.A" style:family="table-column">
      <style:table-column-properties style:column-width="6.35cm"/>
    </style:style>
    <style:style style:name="Tableau1.1" style:family="table-row">
      <style:table-row-properties style:min-row-height="1.196cm" fo:keep-together="auto"/>
    </style:style>
    <style:style style:name="Tableau1.A1" style:family="table-cell">
      <style:table-cell-properties fo:padding-left="0.191cm" fo:padding-right="0.191cm" fo:padding-top="0cm" fo:padding-bottom="0cm" fo:border="none"/>
    </style:style>
    <style:style style:name="Tableau6" style:family="table">
      <style:table-properties style:width="16.51cm" fo:margin-top="0cm" fo:margin-bottom="0cm" table:align="center" style:writing-mode="page"/>
    </style:style>
    <style:style style:name="Tableau6.A" style:family="table-column">
      <style:table-column-properties style:column-width="5.503cm"/>
    </style:style>
    <style:style style:name="Tableau6.1" style:family="table-row">
      <style:table-row-properties fo:keep-together="auto"/>
    </style:style>
    <style:style style:name="Tableau6.A1" style:family="table-cell">
      <style:table-cell-properties style:vertical-align="middle" fo:background-color="#0ea5e9" fo:padding-left="0.212cm" fo:padding-right="0.212cm" fo:padding-top="0.282cm" fo:padding-bottom="0.282cm" fo:border="0.5pt solid #ffffff">
        <style:background-image/>
      </style:table-cell-properties>
    </style:style>
    <style:style style:name="Tableau6.B1" style:family="table-cell">
      <style:table-cell-properties fo:padding-left="0.191cm" fo:padding-right="0.191cm" fo:padding-top="0cm" fo:padding-bottom="0cm" fo:border="none"/>
    </style:style>
    <style:style style:name="Tableau6.C1" style:family="table-cell">
      <style:table-cell-properties fo:padding-left="0.191cm" fo:padding-right="0.191cm" fo:padding-top="0cm" fo:padding-bottom="0cm" fo:border="none"/>
    </style:style>
    <style:style style:name="Tableau6.A2" style:family="table-cell">
      <style:table-cell-properties fo:padding-left="0cm" fo:padding-right="0cm" fo:padding-top="0.071cm" fo:padding-bottom="0.071cm" fo:border="none"/>
    </style:style>
    <style:style style:name="Tableau6.A3" style:family="table-cell">
      <style:table-cell-properties fo:padding-left="0.191cm" fo:padding-right="0.191cm" fo:padding-top="0cm" fo:padding-bottom="0cm" fo:border="none"/>
    </style:style>
    <style:style style:name="Tableau6.A4" style:family="table-cell">
      <style:table-cell-properties fo:padding-left="0cm" fo:padding-right="0cm" fo:padding-top="0.071cm" fo:padding-bottom="0.071cm" fo:border="none"/>
    </style:style>
    <style:style style:name="Tableau6.A5" style:family="table-cell">
      <style:table-cell-properties fo:padding-left="0.191cm" fo:padding-right="0.191cm" fo:padding-top="0cm" fo:padding-bottom="0cm" fo:border="none"/>
    </style:style>
    <style:style style:name="Tableau6.B5" style:family="table-cell">
      <style:table-cell-properties fo:padding-left="0.191cm" fo:padding-right="0.191cm" fo:padding-top="0cm" fo:padding-bottom="0cm" fo:border="none"/>
    </style:style>
    <style:style style:name="Tableau6.C5" style:family="table-cell">
      <style:table-cell-properties fo:padding-left="0.191cm" fo:padding-right="0.191cm" fo:padding-top="0cm" fo:padding-bottom="0cm" fo:border="none"/>
    </style:style>
    <style:style style:name="Tableau6.A6" style:family="table-cell">
      <style:table-cell-properties fo:padding-left="0cm" fo:padding-right="0cm" fo:padding-top="0.071cm" fo:padding-bottom="0.071cm" fo:border="none"/>
    </style:style>
    <style:style style:name="Tableau6.A7" style:family="table-cell">
      <style:table-cell-properties fo:padding-left="0.191cm" fo:padding-right="0.191cm" fo:padding-top="0cm" fo:padding-bottom="0cm" fo:border="none"/>
    </style:style>
    <style:style style:name="Tableau2" style:family="table">
      <style:table-properties style:width="16.51cm" fo:margin-left="0.009cm" fo:margin-top="0cm" fo:margin-bottom="0cm" table:align="left" style:writing-mode="page"/>
    </style:style>
    <style:style style:name="Tableau2.A" style:family="table-column">
      <style:table-column-properties style:column-width="16.51cm"/>
    </style:style>
    <style:style style:name="Tableau2.1" style:family="table-row">
      <style:table-row-properties fo:keep-together="auto"/>
    </style:style>
    <style:style style:name="Tableau2.A1" style:family="table-cell">
      <style:table-cell-properties style:vertical-align="middle" fo:background-color="#0f172a" fo:padding-left="0.212cm" fo:padding-right="0.212cm" fo:padding-top="0.282cm" fo:padding-bottom="0.282cm" fo:border="0.5pt solid #ffffff">
        <style:background-image/>
      </style:table-cell-properties>
    </style:style>
    <style:style style:name="Tableau3" style:family="table">
      <style:table-properties style:width="5.503cm" fo:margin-left="0.009cm" fo:margin-top="0cm" fo:margin-bottom="0cm" table:align="left" style:writing-mode="page"/>
    </style:style>
    <style:style style:name="Tableau3.A" style:family="table-column">
      <style:table-column-properties style:column-width="5.503cm"/>
    </style:style>
    <style:style style:name="Tableau3.1" style:family="table-row">
      <style:table-row-properties fo:keep-together="auto"/>
    </style:style>
    <style:style style:name="Tableau3.A1" style:family="table-cell">
      <style:table-cell-properties style:vertical-align="middle" fo:background-color="#22c55e" fo:padding-left="0.212cm" fo:padding-right="0.212cm" fo:padding-top="0.282cm" fo:padding-bottom="0.282cm" fo:border="0.5pt solid #ffffff">
        <style:background-image/>
      </style:table-cell-properties>
    </style:style>
    <style:style style:name="Tableau4" style:family="table">
      <style:table-properties style:width="5.503cm" fo:margin-left="0.009cm" fo:margin-top="0cm" fo:margin-bottom="0cm" table:align="left" style:writing-mode="page"/>
    </style:style>
    <style:style style:name="Tableau4.A" style:family="table-column">
      <style:table-column-properties style:column-width="5.503cm"/>
    </style:style>
    <style:style style:name="Tableau4.1" style:family="table-row">
      <style:table-row-properties fo:keep-together="auto"/>
    </style:style>
    <style:style style:name="Tableau4.A1" style:family="table-cell">
      <style:table-cell-properties style:vertical-align="middle" fo:background-color="#f59e0b" fo:padding-left="0.212cm" fo:padding-right="0.212cm" fo:padding-top="0.282cm" fo:padding-bottom="0.282cm" fo:border="0.5pt solid #ffffff">
        <style:background-image/>
      </style:table-cell-properties>
    </style:style>
    <style:style style:name="Tableau5" style:family="table">
      <style:table-properties style:width="16.51cm" fo:margin-left="0.009cm" fo:margin-top="0cm" fo:margin-bottom="0cm" table:align="left" style:writing-mode="page"/>
    </style:style>
    <style:style style:name="Tableau5.A" style:family="table-column">
      <style:table-column-properties style:column-width="8.255cm"/>
    </style:style>
    <style:style style:name="Tableau5.1" style:family="table-row">
      <style:table-row-properties fo:keep-together="auto"/>
    </style:style>
    <style:style style:name="Tableau5.A1" style:family="table-cell">
      <style:table-cell-properties style:vertical-align="middle" fo:background-color="#ef4444" fo:padding-left="0.212cm" fo:padding-right="0.212cm" fo:padding-top="0.282cm" fo:padding-bottom="0.282cm" fo:border="0.5pt solid #ffffff">
        <style:background-image/>
      </style:table-cell-properties>
    </style:style>
    <style:style style:name="Tableau5.B1" style:family="table-cell">
      <style:table-cell-properties style:vertical-align="middle" fo:background-color="#8b5cf6" fo:padding-left="0.212cm" fo:padding-right="0.212cm" fo:padding-top="0.282cm" fo:padding-bottom="0.282cm" fo:border="0.5pt solid #ffffff">
        <style:background-image/>
      </style:table-cell-properties>
    </style:style>
    <style:style style:name="Tableau7" style:family="table">
      <style:table-properties style:width="16.51cm" fo:margin-left="0.009cm" fo:margin-top="0cm" fo:margin-bottom="0cm" table:align="left" style:writing-mode="page"/>
    </style:style>
    <style:style style:name="Tableau7.A" style:family="table-column">
      <style:table-column-properties style:column-width="5.267cm"/>
    </style:style>
    <style:style style:name="Tableau7.B" style:family="table-column">
      <style:table-column-properties style:column-width="0.355cm"/>
    </style:style>
    <style:style style:name="Tableau7.C" style:family="table-column">
      <style:table-column-properties style:column-width="5.265cm"/>
    </style:style>
    <style:style style:name="Tableau7.E" style:family="table-column">
      <style:table-column-properties style:column-width="5.269cm"/>
    </style:style>
    <style:style style:name="Tableau7.1" style:family="table-row">
      <style:table-row-properties fo:keep-together="auto"/>
    </style:style>
    <style:style style:name="Tableau7.A1" style:family="table-cell">
      <style:table-cell-properties style:vertical-align="middle" fo:background-color="#0ea5e9" fo:padding-left="0.212cm" fo:padding-right="0.212cm" fo:padding-top="0.282cm" fo:padding-bottom="0.282cm" fo:border="0.5pt solid #ffffff">
        <style:background-image/>
      </style:table-cell-properties>
    </style:style>
    <style:style style:name="Tableau7.B1" style:family="table-cell">
      <style:table-cell-properties style:vertical-align="middle" fo:padding-left="0.191cm" fo:padding-right="0.191cm" fo:padding-top="0cm" fo:padding-bottom="0cm" fo:border="none"/>
    </style:style>
    <style:style style:name="Tableau7.C1" style:family="table-cell">
      <style:table-cell-properties style:vertical-align="middle" fo:background-color="#f59e0b" fo:padding-left="0.212cm" fo:padding-right="0.212cm" fo:padding-top="0.282cm" fo:padding-bottom="0.282cm" fo:border="0.5pt solid #ffffff">
        <style:background-image/>
      </style:table-cell-properties>
    </style:style>
    <style:style style:name="Tableau7.D1" style:family="table-cell">
      <style:table-cell-properties style:vertical-align="middle" fo:padding-left="0.191cm" fo:padding-right="0.191cm" fo:padding-top="0cm" fo:padding-bottom="0cm" fo:border="none"/>
    </style:style>
    <style:style style:name="Tableau7.E1" style:family="table-cell">
      <style:table-cell-properties style:vertical-align="middle" fo:background-color="#22c55e" fo:padding-left="0.212cm" fo:padding-right="0.212cm" fo:padding-top="0.282cm" fo:padding-bottom="0.282cm" fo:border="0.5pt solid #ffffff">
        <style:background-image/>
      </style:table-cell-properties>
    </style:style>
    <style:style style:name="Tableau8" style:family="table">
      <style:table-properties style:width="16.51cm" fo:margin-left="0.004cm" fo:margin-top="0cm" fo:margin-bottom="0cm" table:align="left" style:writing-mode="page"/>
    </style:style>
    <style:style style:name="Tableau8.A" style:family="table-column">
      <style:table-column-properties style:column-width="4.232cm"/>
    </style:style>
    <style:style style:name="Tableau8.B" style:family="table-column">
      <style:table-column-properties style:column-width="12.278cm"/>
    </style:style>
    <style:style style:name="Tableau8.1" style:family="table-row">
      <style:table-row-properties fo:keep-together="auto"/>
    </style:style>
    <style:style style:name="Tableau8.A1" style:family="table-cell">
      <style:table-cell-properties style:vertical-align="middle" fo:background-color="#0f172a" fo:padding-left="0.247cm" fo:padding-right="0.247cm" fo:padding-top="0.176cm" fo:padding-bottom="0.176cm" fo:border="0.25pt solid #d0d5dd">
        <style:background-image/>
      </style:table-cell-properties>
    </style:style>
    <style:style style:name="Tableau8.A2" style:family="table-cell">
      <style:table-cell-properties style:vertical-align="middle" fo:padding-left="0.247cm" fo:padding-right="0.247cm" fo:padding-top="0.176cm" fo:padding-bottom="0.176cm" fo:border="0.25pt solid #d0d5dd"/>
    </style:style>
    <style:style style:name="Tableau8.B2" style:family="table-cell">
      <style:table-cell-properties style:vertical-align="middle" fo:padding-left="0.247cm" fo:padding-right="0.247cm" fo:padding-top="0.176cm" fo:padding-bottom="0.176cm" fo:border="0.25pt solid #d0d5dd"/>
    </style:style>
    <style:style style:name="Tableau8.A3" style:family="table-cell">
      <style:table-cell-properties style:vertical-align="middle" fo:padding-left="0.247cm" fo:padding-right="0.247cm" fo:padding-top="0.176cm" fo:padding-bottom="0.176cm" fo:border="0.25pt solid #d0d5dd"/>
    </style:style>
    <style:style style:name="Tableau8.B3" style:family="table-cell">
      <style:table-cell-properties style:vertical-align="middle" fo:padding-left="0.247cm" fo:padding-right="0.247cm" fo:padding-top="0.176cm" fo:padding-bottom="0.176cm" fo:border="0.25pt solid #d0d5dd"/>
    </style:style>
    <style:style style:name="Tableau8.A4" style:family="table-cell">
      <style:table-cell-properties style:vertical-align="middle" fo:padding-left="0.247cm" fo:padding-right="0.247cm" fo:padding-top="0.176cm" fo:padding-bottom="0.176cm" fo:border="0.25pt solid #d0d5dd"/>
    </style:style>
    <style:style style:name="Tableau8.B4" style:family="table-cell">
      <style:table-cell-properties style:vertical-align="middle" fo:padding-left="0.247cm" fo:padding-right="0.247cm" fo:padding-top="0.176cm" fo:padding-bottom="0.176cm" fo:border="0.25pt solid #d0d5dd"/>
    </style:style>
    <style:style style:name="Tableau8.A5" style:family="table-cell">
      <style:table-cell-properties style:vertical-align="middle" fo:padding-left="0.247cm" fo:padding-right="0.247cm" fo:padding-top="0.176cm" fo:padding-bottom="0.176cm" fo:border="0.25pt solid #d0d5dd"/>
    </style:style>
    <style:style style:name="Tableau8.B5" style:family="table-cell">
      <style:table-cell-properties style:vertical-align="middle" fo:padding-left="0.247cm" fo:padding-right="0.247cm" fo:padding-top="0.176cm" fo:padding-bottom="0.176cm" fo:border="0.25pt solid #d0d5dd"/>
    </style:style>
    <style:style style:name="Tableau8.A6" style:family="table-cell">
      <style:table-cell-properties style:vertical-align="middle" fo:padding-left="0.247cm" fo:padding-right="0.247cm" fo:padding-top="0.176cm" fo:padding-bottom="0.176cm" fo:border="0.25pt solid #d0d5dd"/>
    </style:style>
    <style:style style:name="Tableau8.B6" style:family="table-cell">
      <style:table-cell-properties style:vertical-align="middle" fo:padding-left="0.247cm" fo:padding-right="0.247cm" fo:padding-top="0.176cm" fo:padding-bottom="0.176cm" fo:border="0.25pt solid #d0d5dd"/>
    </style:style>
    <style:style style:name="Tableau8.A7" style:family="table-cell">
      <style:table-cell-properties style:vertical-align="middle" fo:padding-left="0.247cm" fo:padding-right="0.247cm" fo:padding-top="0.176cm" fo:padding-bottom="0.176cm" fo:border="0.25pt solid #d0d5dd"/>
    </style:style>
    <style:style style:name="Tableau8.B7" style:family="table-cell">
      <style:table-cell-properties style:vertical-align="middle" fo:padding-left="0.247cm" fo:padding-right="0.247cm" fo:padding-top="0.176cm" fo:padding-bottom="0.176cm" fo:border="0.25pt solid #d0d5dd"/>
    </style:style>
    <style:style style:name="Tableau9" style:family="table">
      <style:table-properties style:width="16.51cm" fo:margin-left="0.004cm" fo:margin-top="0cm" fo:margin-bottom="0cm" table:align="left" style:writing-mode="page"/>
    </style:style>
    <style:style style:name="Tableau9.A" style:family="table-column">
      <style:table-column-properties style:column-width="3.879cm"/>
    </style:style>
    <style:style style:name="Tableau9.B" style:family="table-column">
      <style:table-column-properties style:column-width="12.631cm"/>
    </style:style>
    <style:style style:name="Tableau9.1" style:family="table-row">
      <style:table-row-properties fo:keep-together="auto"/>
    </style:style>
    <style:style style:name="Tableau9.A1" style:family="table-cell">
      <style:table-cell-properties style:vertical-align="middle" fo:background-color="#0f172a" fo:padding-left="0.247cm" fo:padding-right="0.247cm" fo:padding-top="0.176cm" fo:padding-bottom="0.176cm" fo:border="0.25pt solid #d0d5dd">
        <style:background-image/>
      </style:table-cell-properties>
    </style:style>
    <style:style style:name="Tableau9.A2" style:family="table-cell">
      <style:table-cell-properties style:vertical-align="middle" fo:padding-left="0.247cm" fo:padding-right="0.247cm" fo:padding-top="0.176cm" fo:padding-bottom="0.176cm" fo:border="0.25pt solid #d0d5dd"/>
    </style:style>
    <style:style style:name="Tableau9.B2" style:family="table-cell">
      <style:table-cell-properties style:vertical-align="middle" fo:padding-left="0.247cm" fo:padding-right="0.247cm" fo:padding-top="0.176cm" fo:padding-bottom="0.176cm" fo:border="0.25pt solid #d0d5dd"/>
    </style:style>
    <style:style style:name="Tableau9.A3" style:family="table-cell">
      <style:table-cell-properties style:vertical-align="middle" fo:padding-left="0.247cm" fo:padding-right="0.247cm" fo:padding-top="0.176cm" fo:padding-bottom="0.176cm" fo:border="0.25pt solid #d0d5dd"/>
    </style:style>
    <style:style style:name="Tableau9.B3" style:family="table-cell">
      <style:table-cell-properties style:vertical-align="middle" fo:padding-left="0.247cm" fo:padding-right="0.247cm" fo:padding-top="0.176cm" fo:padding-bottom="0.176cm" fo:border="0.25pt solid #d0d5dd"/>
    </style:style>
    <style:style style:name="Tableau9.A4" style:family="table-cell">
      <style:table-cell-properties style:vertical-align="middle" fo:padding-left="0.247cm" fo:padding-right="0.247cm" fo:padding-top="0.176cm" fo:padding-bottom="0.176cm" fo:border="0.25pt solid #d0d5dd"/>
    </style:style>
    <style:style style:name="Tableau9.B4" style:family="table-cell">
      <style:table-cell-properties style:vertical-align="middle" fo:padding-left="0.247cm" fo:padding-right="0.247cm" fo:padding-top="0.176cm" fo:padding-bottom="0.176cm" fo:border="0.25pt solid #d0d5dd"/>
    </style:style>
    <style:style style:name="Tableau9.A5" style:family="table-cell">
      <style:table-cell-properties style:vertical-align="middle" fo:padding-left="0.247cm" fo:padding-right="0.247cm" fo:padding-top="0.176cm" fo:padding-bottom="0.176cm" fo:border="0.25pt solid #d0d5dd"/>
    </style:style>
    <style:style style:name="Tableau9.B5" style:family="table-cell">
      <style:table-cell-properties style:vertical-align="middle" fo:padding-left="0.247cm" fo:padding-right="0.247cm" fo:padding-top="0.176cm" fo:padding-bottom="0.176cm" fo:border="0.25pt solid #d0d5dd"/>
    </style:style>
    <style:style style:name="Tableau9.A6" style:family="table-cell">
      <style:table-cell-properties style:vertical-align="middle" fo:padding-left="0.247cm" fo:padding-right="0.247cm" fo:padding-top="0.176cm" fo:padding-bottom="0.176cm" fo:border="0.25pt solid #d0d5dd"/>
    </style:style>
    <style:style style:name="Tableau9.B6" style:family="table-cell">
      <style:table-cell-properties style:vertical-align="middle" fo:padding-left="0.247cm" fo:padding-right="0.247cm" fo:padding-top="0.176cm" fo:padding-bottom="0.176cm" fo:border="0.25pt solid #d0d5dd"/>
    </style:style>
    <style:style style:name="Tableau9.A7" style:family="table-cell">
      <style:table-cell-properties style:vertical-align="middle" fo:padding-left="0.247cm" fo:padding-right="0.247cm" fo:padding-top="0.176cm" fo:padding-bottom="0.176cm" fo:border="0.25pt solid #d0d5dd"/>
    </style:style>
    <style:style style:name="Tableau9.B7" style:family="table-cell">
      <style:table-cell-properties style:vertical-align="middle" fo:padding-left="0.247cm" fo:padding-right="0.247cm" fo:padding-top="0.176cm" fo:padding-bottom="0.176cm" fo:border="0.25pt solid #d0d5dd"/>
    </style:style>
    <style:style style:name="Tableau9.A8" style:family="table-cell">
      <style:table-cell-properties style:vertical-align="middle" fo:padding-left="0.247cm" fo:padding-right="0.247cm" fo:padding-top="0.176cm" fo:padding-bottom="0.176cm" fo:border="0.25pt solid #d0d5dd"/>
    </style:style>
    <style:style style:name="Tableau9.B8" style:family="table-cell">
      <style:table-cell-properties style:vertical-align="middle" fo:padding-left="0.247cm" fo:padding-right="0.247cm" fo:padding-top="0.176cm" fo:padding-bottom="0.176cm" fo:border="0.25pt solid #d0d5dd"/>
    </style:style>
    <style:style style:name="Tableau9.A9" style:family="table-cell">
      <style:table-cell-properties style:vertical-align="middle" fo:padding-left="0.247cm" fo:padding-right="0.247cm" fo:padding-top="0.176cm" fo:padding-bottom="0.176cm" fo:border="0.25pt solid #d0d5dd"/>
    </style:style>
    <style:style style:name="Tableau9.B9" style:family="table-cell">
      <style:table-cell-properties style:vertical-align="middle" fo:padding-left="0.247cm" fo:padding-right="0.247cm" fo:padding-top="0.176cm" fo:padding-bottom="0.176cm" fo:border="0.25pt solid #d0d5dd"/>
    </style:style>
    <style:style style:name="Tableau10" style:family="table">
      <style:table-properties style:width="16.51cm" fo:margin-left="0.004cm" fo:margin-top="0cm" fo:margin-bottom="0cm" table:align="left" style:writing-mode="page"/>
    </style:style>
    <style:style style:name="Tableau10.A" style:family="table-column">
      <style:table-column-properties style:column-width="4.232cm"/>
    </style:style>
    <style:style style:name="Tableau10.B" style:family="table-column">
      <style:table-column-properties style:column-width="12.278cm"/>
    </style:style>
    <style:style style:name="Tableau10.1" style:family="table-row">
      <style:table-row-properties fo:keep-together="auto"/>
    </style:style>
    <style:style style:name="Tableau10.A1" style:family="table-cell">
      <style:table-cell-properties style:vertical-align="middle" fo:background-color="#0f172a" fo:padding-left="0.247cm" fo:padding-right="0.247cm" fo:padding-top="0.176cm" fo:padding-bottom="0.176cm" fo:border="0.25pt solid #d0d5dd">
        <style:background-image/>
      </style:table-cell-properties>
    </style:style>
    <style:style style:name="Tableau10.A2" style:family="table-cell">
      <style:table-cell-properties style:vertical-align="middle" fo:padding-left="0.247cm" fo:padding-right="0.247cm" fo:padding-top="0.176cm" fo:padding-bottom="0.176cm" fo:border="0.25pt solid #d0d5dd"/>
    </style:style>
    <style:style style:name="Tableau10.B2" style:family="table-cell">
      <style:table-cell-properties style:vertical-align="middle" fo:padding-left="0.247cm" fo:padding-right="0.247cm" fo:padding-top="0.176cm" fo:padding-bottom="0.176cm" fo:border="0.25pt solid #d0d5dd"/>
    </style:style>
    <style:style style:name="Tableau10.A3" style:family="table-cell">
      <style:table-cell-properties style:vertical-align="middle" fo:padding-left="0.247cm" fo:padding-right="0.247cm" fo:padding-top="0.176cm" fo:padding-bottom="0.176cm" fo:border="0.25pt solid #d0d5dd"/>
    </style:style>
    <style:style style:name="Tableau10.B3" style:family="table-cell">
      <style:table-cell-properties style:vertical-align="middle" fo:padding-left="0.247cm" fo:padding-right="0.247cm" fo:padding-top="0.176cm" fo:padding-bottom="0.176cm" fo:border="0.25pt solid #d0d5dd"/>
    </style:style>
    <style:style style:name="Tableau10.A4" style:family="table-cell">
      <style:table-cell-properties style:vertical-align="middle" fo:padding-left="0.247cm" fo:padding-right="0.247cm" fo:padding-top="0.176cm" fo:padding-bottom="0.176cm" fo:border="0.25pt solid #d0d5dd"/>
    </style:style>
    <style:style style:name="Tableau10.B4" style:family="table-cell">
      <style:table-cell-properties style:vertical-align="middle" fo:padding-left="0.247cm" fo:padding-right="0.247cm" fo:padding-top="0.176cm" fo:padding-bottom="0.176cm" fo:border="0.25pt solid #d0d5dd"/>
    </style:style>
    <style:style style:name="Tableau10.A5" style:family="table-cell">
      <style:table-cell-properties style:vertical-align="middle" fo:padding-left="0.247cm" fo:padding-right="0.247cm" fo:padding-top="0.176cm" fo:padding-bottom="0.176cm" fo:border="0.25pt solid #d0d5dd"/>
    </style:style>
    <style:style style:name="Tableau10.B5" style:family="table-cell">
      <style:table-cell-properties style:vertical-align="middle" fo:padding-left="0.247cm" fo:padding-right="0.247cm" fo:padding-top="0.176cm" fo:padding-bottom="0.176cm" fo:border="0.25pt solid #d0d5dd"/>
    </style:style>
    <style:style style:name="Tableau10.A6" style:family="table-cell">
      <style:table-cell-properties style:vertical-align="middle" fo:padding-left="0.247cm" fo:padding-right="0.247cm" fo:padding-top="0.176cm" fo:padding-bottom="0.176cm" fo:border="0.25pt solid #d0d5dd"/>
    </style:style>
    <style:style style:name="Tableau10.B6" style:family="table-cell">
      <style:table-cell-properties style:vertical-align="middle" fo:padding-left="0.247cm" fo:padding-right="0.247cm" fo:padding-top="0.176cm" fo:padding-bottom="0.176cm" fo:border="0.25pt solid #d0d5dd"/>
    </style:style>
    <style:style style:name="Tableau10.A7" style:family="table-cell">
      <style:table-cell-properties style:vertical-align="middle" fo:padding-left="0.247cm" fo:padding-right="0.247cm" fo:padding-top="0.176cm" fo:padding-bottom="0.176cm" fo:border="0.25pt solid #d0d5dd"/>
    </style:style>
    <style:style style:name="Tableau10.B7" style:family="table-cell">
      <style:table-cell-properties style:vertical-align="middle" fo:padding-left="0.247cm" fo:padding-right="0.247cm" fo:padding-top="0.176cm" fo:padding-bottom="0.176cm" fo:border="0.25pt solid #d0d5dd"/>
    </style:style>
    <style:style style:name="Tableau10.A8" style:family="table-cell">
      <style:table-cell-properties style:vertical-align="middle" fo:padding-left="0.247cm" fo:padding-right="0.247cm" fo:padding-top="0.176cm" fo:padding-bottom="0.176cm" fo:border="0.25pt solid #d0d5dd"/>
    </style:style>
    <style:style style:name="Tableau10.B8" style:family="table-cell">
      <style:table-cell-properties style:vertical-align="middle" fo:padding-left="0.247cm" fo:padding-right="0.247cm" fo:padding-top="0.176cm" fo:padding-bottom="0.176cm" fo:border="0.25pt solid #d0d5dd"/>
    </style:style>
    <style:style style:name="Tableau10.A9" style:family="table-cell">
      <style:table-cell-properties style:vertical-align="middle" fo:padding-left="0.247cm" fo:padding-right="0.247cm" fo:padding-top="0.176cm" fo:padding-bottom="0.176cm" fo:border="0.25pt solid #d0d5dd"/>
    </style:style>
    <style:style style:name="Tableau10.B9" style:family="table-cell">
      <style:table-cell-properties style:vertical-align="middle" fo:padding-left="0.247cm" fo:padding-right="0.247cm" fo:padding-top="0.176cm" fo:padding-bottom="0.176cm" fo:border="0.25pt solid #d0d5dd"/>
    </style:style>
    <style:style style:name="Tableau11" style:family="table">
      <style:table-properties style:width="16.51cm" fo:margin-left="0.004cm" fo:margin-top="0cm" fo:margin-bottom="0cm" table:align="left" style:writing-mode="page"/>
    </style:style>
    <style:style style:name="Tableau11.A" style:family="table-column">
      <style:table-column-properties style:column-width="3.173cm"/>
    </style:style>
    <style:style style:name="Tableau11.B" style:family="table-column">
      <style:table-column-properties style:column-width="2.822cm"/>
    </style:style>
    <style:style style:name="Tableau11.C" style:family="table-column">
      <style:table-column-properties style:column-width="10.515cm"/>
    </style:style>
    <style:style style:name="Tableau11.1" style:family="table-row">
      <style:table-row-properties fo:keep-together="auto"/>
    </style:style>
    <style:style style:name="Tableau11.A1" style:family="table-cell">
      <style:table-cell-properties style:vertical-align="middle" fo:background-color="#0f172a" fo:padding-left="0.247cm" fo:padding-right="0.247cm" fo:padding-top="0.176cm" fo:padding-bottom="0.176cm" fo:border="0.25pt solid #d0d5dd">
        <style:background-image/>
      </style:table-cell-properties>
    </style:style>
    <style:style style:name="Tableau11.A2" style:family="table-cell">
      <style:table-cell-properties style:vertical-align="middle" fo:padding-left="0.247cm" fo:padding-right="0.247cm" fo:padding-top="0.176cm" fo:padding-bottom="0.176cm" fo:border="0.25pt solid #d0d5dd"/>
    </style:style>
    <style:style style:name="Tableau11.B2" style:family="table-cell">
      <style:table-cell-properties style:vertical-align="middle" fo:padding-left="0.247cm" fo:padding-right="0.247cm" fo:padding-top="0.176cm" fo:padding-bottom="0.176cm" fo:border="0.25pt solid #d0d5dd"/>
    </style:style>
    <style:style style:name="Tableau11.C2" style:family="table-cell">
      <style:table-cell-properties style:vertical-align="middle" fo:padding-left="0.247cm" fo:padding-right="0.247cm" fo:padding-top="0.176cm" fo:padding-bottom="0.176cm" fo:border="0.25pt solid #d0d5dd"/>
    </style:style>
    <style:style style:name="Tableau11.A3" style:family="table-cell">
      <style:table-cell-properties style:vertical-align="middle" fo:padding-left="0.247cm" fo:padding-right="0.247cm" fo:padding-top="0.176cm" fo:padding-bottom="0.176cm" fo:border="0.25pt solid #d0d5dd"/>
    </style:style>
    <style:style style:name="Tableau11.B3" style:family="table-cell">
      <style:table-cell-properties style:vertical-align="middle" fo:padding-left="0.247cm" fo:padding-right="0.247cm" fo:padding-top="0.176cm" fo:padding-bottom="0.176cm" fo:border="0.25pt solid #d0d5dd"/>
    </style:style>
    <style:style style:name="Tableau11.C3" style:family="table-cell">
      <style:table-cell-properties style:vertical-align="middle" fo:padding-left="0.247cm" fo:padding-right="0.247cm" fo:padding-top="0.176cm" fo:padding-bottom="0.176cm" fo:border="0.25pt solid #d0d5dd"/>
    </style:style>
    <style:style style:name="Tableau11.A4" style:family="table-cell">
      <style:table-cell-properties style:vertical-align="middle" fo:padding-left="0.247cm" fo:padding-right="0.247cm" fo:padding-top="0.176cm" fo:padding-bottom="0.176cm" fo:border="0.25pt solid #d0d5dd"/>
    </style:style>
    <style:style style:name="Tableau11.B4" style:family="table-cell">
      <style:table-cell-properties style:vertical-align="middle" fo:padding-left="0.247cm" fo:padding-right="0.247cm" fo:padding-top="0.176cm" fo:padding-bottom="0.176cm" fo:border="0.25pt solid #d0d5dd"/>
    </style:style>
    <style:style style:name="Tableau11.C4" style:family="table-cell">
      <style:table-cell-properties style:vertical-align="middle" fo:padding-left="0.247cm" fo:padding-right="0.247cm" fo:padding-top="0.176cm" fo:padding-bottom="0.176cm" fo:border="0.25pt solid #d0d5dd"/>
    </style:style>
    <style:style style:name="Tableau11.A5" style:family="table-cell">
      <style:table-cell-properties style:vertical-align="middle" fo:padding-left="0.247cm" fo:padding-right="0.247cm" fo:padding-top="0.176cm" fo:padding-bottom="0.176cm" fo:border="0.25pt solid #d0d5dd"/>
    </style:style>
    <style:style style:name="Tableau11.B5" style:family="table-cell">
      <style:table-cell-properties style:vertical-align="middle" fo:padding-left="0.247cm" fo:padding-right="0.247cm" fo:padding-top="0.176cm" fo:padding-bottom="0.176cm" fo:border="0.25pt solid #d0d5dd"/>
    </style:style>
    <style:style style:name="Tableau11.C5" style:family="table-cell">
      <style:table-cell-properties style:vertical-align="middle" fo:padding-left="0.247cm" fo:padding-right="0.247cm" fo:padding-top="0.176cm" fo:padding-bottom="0.176cm" fo:border="0.25pt solid #d0d5dd"/>
    </style:style>
    <style:style style:name="Tableau12" style:family="table">
      <style:table-properties style:width="16.51cm" fo:margin-left="0.004cm" fo:margin-top="0cm" fo:margin-bottom="0cm" table:align="left" style:writing-mode="page"/>
    </style:style>
    <style:style style:name="Tableau12.A" style:family="table-column">
      <style:table-column-properties style:column-width="16.51cm"/>
    </style:style>
    <style:style style:name="Tableau12.1" style:family="table-row">
      <style:table-row-properties fo:keep-together="auto"/>
    </style:style>
    <style:style style:name="Tableau12.A1" style:family="table-cell">
      <style:table-cell-properties fo:background-color="#0f172a" fo:padding-left="0.353cm" fo:padding-right="0.353cm" fo:padding-top="0.282cm" fo:padding-bottom="0.282cm" fo:border="0.25pt solid #0f172a">
        <style:background-image/>
      </style:table-cell-properties>
    </style:style>
    <style:style style:name="Tableau13" style:family="table">
      <style:table-properties style:width="16.51cm" fo:margin-left="0.004cm" fo:margin-top="0cm" fo:margin-bottom="0cm" table:align="left" style:writing-mode="page"/>
    </style:style>
    <style:style style:name="Tableau13.A" style:family="table-column">
      <style:table-column-properties style:column-width="16.51cm"/>
    </style:style>
    <style:style style:name="Tableau13.1" style:family="table-row">
      <style:table-row-properties fo:keep-together="auto"/>
    </style:style>
    <style:style style:name="Tableau13.A1" style:family="table-cell">
      <style:table-cell-properties fo:background-color="#0f172a" fo:padding-left="0.353cm" fo:padding-right="0.353cm" fo:padding-top="0.282cm" fo:padding-bottom="0.282cm" fo:border="0.25pt solid #0f172a">
        <style:background-image/>
      </style:table-cell-properties>
    </style:style>
    <style:style style:name="Tableau14" style:family="table">
      <style:table-properties style:width="16.51cm" fo:margin-left="0.004cm" fo:margin-top="0cm" fo:margin-bottom="0cm" table:align="left" style:writing-mode="page"/>
    </style:style>
    <style:style style:name="Tableau14.A" style:family="table-column">
      <style:table-column-properties style:column-width="16.51cm"/>
    </style:style>
    <style:style style:name="Tableau14.1" style:family="table-row">
      <style:table-row-properties fo:keep-together="auto"/>
    </style:style>
    <style:style style:name="Tableau14.A1" style:family="table-cell">
      <style:table-cell-properties fo:background-color="#0f172a" fo:padding-left="0.353cm" fo:padding-right="0.353cm" fo:padding-top="0.282cm" fo:padding-bottom="0.282cm" fo:border="0.25pt solid #0f172a">
        <style:background-image/>
      </style:table-cell-properties>
    </style:style>
    <style:style style:name="Tableau15" style:family="table">
      <style:table-properties style:width="16.51cm" fo:margin-left="0.004cm" fo:margin-top="0cm" fo:margin-bottom="0cm" table:align="left" style:writing-mode="page"/>
    </style:style>
    <style:style style:name="Tableau15.A" style:family="table-column">
      <style:table-column-properties style:column-width="16.51cm"/>
    </style:style>
    <style:style style:name="Tableau15.1" style:family="table-row">
      <style:table-row-properties fo:keep-together="auto"/>
    </style:style>
    <style:style style:name="Tableau15.A1" style:family="table-cell">
      <style:table-cell-properties fo:background-color="#0f172a" fo:padding-left="0.353cm" fo:padding-right="0.353cm" fo:padding-top="0.282cm" fo:padding-bottom="0.282cm" fo:border="0.25pt solid #0f172a">
        <style:background-image/>
      </style:table-cell-properties>
    </style:style>
    <style:style style:name="Tableau16" style:family="table">
      <style:table-properties style:width="16.51cm" fo:margin-left="0.004cm" fo:margin-top="0cm" fo:margin-bottom="0cm" table:align="left" style:writing-mode="page"/>
    </style:style>
    <style:style style:name="Tableau16.A" style:family="table-column">
      <style:table-column-properties style:column-width="16.51cm"/>
    </style:style>
    <style:style style:name="Tableau16.1" style:family="table-row">
      <style:table-row-properties fo:keep-together="auto"/>
    </style:style>
    <style:style style:name="Tableau16.A1" style:family="table-cell">
      <style:table-cell-properties fo:background-color="#0f172a" fo:padding-left="0.353cm" fo:padding-right="0.353cm" fo:padding-top="0.282cm" fo:padding-bottom="0.282cm" fo:border="0.25pt solid #0f172a">
        <style:background-image/>
      </style:table-cell-properties>
    </style:style>
    <style:style style:name="Tableau17" style:family="table">
      <style:table-properties style:width="16.51cm" fo:margin-left="0.004cm" fo:margin-top="0cm" fo:margin-bottom="0cm" table:align="left" style:writing-mode="page"/>
    </style:style>
    <style:style style:name="Tableau17.A" style:family="table-column">
      <style:table-column-properties style:column-width="16.51cm"/>
    </style:style>
    <style:style style:name="Tableau17.1" style:family="table-row">
      <style:table-row-properties fo:keep-together="auto"/>
    </style:style>
    <style:style style:name="Tableau17.A1" style:family="table-cell">
      <style:table-cell-properties fo:background-color="#0f172a" fo:padding-left="0.353cm" fo:padding-right="0.353cm" fo:padding-top="0.282cm" fo:padding-bottom="0.282cm" fo:border="0.25pt solid #0f172a">
        <style:background-image/>
      </style:table-cell-properties>
    </style:style>
    <style:style style:name="Tableau18" style:family="table">
      <style:table-properties style:width="16.51cm" fo:margin-left="0.004cm" fo:margin-top="0cm" fo:margin-bottom="0cm" table:align="left" style:writing-mode="page"/>
    </style:style>
    <style:style style:name="Tableau18.A" style:family="table-column">
      <style:table-column-properties style:column-width="16.51cm"/>
    </style:style>
    <style:style style:name="Tableau18.1" style:family="table-row">
      <style:table-row-properties fo:keep-together="auto"/>
    </style:style>
    <style:style style:name="Tableau18.A1" style:family="table-cell">
      <style:table-cell-properties fo:background-color="#0f172a" fo:padding-left="0.353cm" fo:padding-right="0.353cm" fo:padding-top="0.282cm" fo:padding-bottom="0.282cm" fo:border="0.25pt solid #0f172a">
        <style:background-image/>
      </style:table-cell-properties>
    </style:style>
    <style:style style:name="Tableau19" style:family="table">
      <style:table-properties style:width="16.51cm" fo:margin-top="0cm" fo:margin-bottom="0cm" table:align="center" style:writing-mode="page"/>
    </style:style>
    <style:style style:name="Tableau19.A" style:family="table-column">
      <style:table-column-properties style:column-width="16.51cm"/>
    </style:style>
    <style:style style:name="Tableau19.1" style:family="table-row">
      <style:table-row-properties fo:keep-together="auto"/>
    </style:style>
    <style:style style:name="Tableau19.A1" style:family="table-cell">
      <style:table-cell-properties fo:background-color="#0ea5e9" fo:padding-left="0.353cm" fo:padding-right="0.353cm" fo:padding-top="0.212cm" fo:padding-bottom="0.212cm" fo:border="0.5pt solid #ffffff">
        <style:background-image/>
      </style:table-cell-properties>
    </style:style>
    <style:style style:name="Tableau19.A2" style:family="table-cell">
      <style:table-cell-properties fo:padding-left="0cm" fo:padding-right="0cm" fo:padding-top="0.035cm" fo:padding-bottom="0.035cm" fo:border="none"/>
    </style:style>
    <style:style style:name="Tableau19.A3" style:family="table-cell">
      <style:table-cell-properties fo:background-color="#0f172a" fo:padding-left="0.353cm" fo:padding-right="0.353cm" fo:padding-top="0.212cm" fo:padding-bottom="0.212cm" fo:border="0.5pt solid #ffffff">
        <style:background-image/>
      </style:table-cell-properties>
    </style:style>
    <style:style style:name="Tableau19.A4" style:family="table-cell">
      <style:table-cell-properties fo:padding-left="0cm" fo:padding-right="0cm" fo:padding-top="0.035cm" fo:padding-bottom="0.035cm" fo:border="none"/>
    </style:style>
    <style:style style:name="Tableau19.A5" style:family="table-cell">
      <style:table-cell-properties fo:background-color="#ef4444" fo:padding-left="0.353cm" fo:padding-right="0.353cm" fo:padding-top="0.212cm" fo:padding-bottom="0.212cm" fo:border="0.5pt solid #ffffff">
        <style:background-image/>
      </style:table-cell-properties>
    </style:style>
    <style:style style:name="Tableau19.A6" style:family="table-cell">
      <style:table-cell-properties fo:padding-left="0cm" fo:padding-right="0cm" fo:padding-top="0.035cm" fo:padding-bottom="0.035cm" fo:border="none"/>
    </style:style>
    <style:style style:name="Tableau19.A7" style:family="table-cell">
      <style:table-cell-properties fo:background-color="#22c55e" fo:padding-left="0.353cm" fo:padding-right="0.353cm" fo:padding-top="0.212cm" fo:padding-bottom="0.212cm" fo:border="0.5pt solid #ffffff">
        <style:background-image/>
      </style:table-cell-properties>
    </style:style>
    <style:style style:name="Tableau19.A8" style:family="table-cell">
      <style:table-cell-properties fo:padding-left="0cm" fo:padding-right="0cm" fo:padding-top="0.035cm" fo:padding-bottom="0.035cm" fo:border="none"/>
    </style:style>
    <style:style style:name="Tableau19.A9" style:family="table-cell">
      <style:table-cell-properties fo:background-color="#f59e0b" fo:padding-left="0.353cm" fo:padding-right="0.353cm" fo:padding-top="0.212cm" fo:padding-bottom="0.212cm" fo:border="0.5pt solid #ffffff">
        <style:background-image/>
      </style:table-cell-properties>
    </style:style>
    <style:style style:name="Tableau20" style:family="table">
      <style:table-properties style:width="16.51cm" fo:margin-left="0.004cm" fo:margin-top="0cm" fo:margin-bottom="0cm" table:align="left" style:writing-mode="page"/>
    </style:style>
    <style:style style:name="Tableau20.A" style:family="table-column">
      <style:table-column-properties style:column-width="16.51cm"/>
    </style:style>
    <style:style style:name="Tableau20.1" style:family="table-row">
      <style:table-row-properties fo:keep-together="auto"/>
    </style:style>
    <style:style style:name="Tableau20.A1" style:family="table-cell">
      <style:table-cell-properties fo:background-color="#0f172a" fo:padding-left="0.353cm" fo:padding-right="0.353cm" fo:padding-top="0.282cm" fo:padding-bottom="0.282cm" fo:border="0.25pt solid #0f172a">
        <style:background-image/>
      </style:table-cell-properties>
    </style:style>
    <style:style style:name="Tableau21" style:family="table">
      <style:table-properties style:width="16.51cm" fo:margin-left="0.004cm" fo:margin-top="0cm" fo:margin-bottom="0cm" table:align="left" style:writing-mode="page"/>
    </style:style>
    <style:style style:name="Tableau21.A" style:family="table-column">
      <style:table-column-properties style:column-width="16.51cm"/>
    </style:style>
    <style:style style:name="Tableau21.1" style:family="table-row">
      <style:table-row-properties fo:keep-together="auto"/>
    </style:style>
    <style:style style:name="Tableau21.A1" style:family="table-cell">
      <style:table-cell-properties fo:background-color="#0f172a" fo:padding-left="0.353cm" fo:padding-right="0.353cm" fo:padding-top="0.282cm" fo:padding-bottom="0.282cm" fo:border="0.25pt solid #0f172a">
        <style:background-image/>
      </style:table-cell-properties>
    </style:style>
    <style:style style:name="Tableau22" style:family="table">
      <style:table-properties style:width="16.51cm" fo:margin-left="0.004cm" fo:margin-top="0cm" fo:margin-bottom="0cm" table:align="left" style:writing-mode="page"/>
    </style:style>
    <style:style style:name="Tableau22.A" style:family="table-column">
      <style:table-column-properties style:column-width="4.232cm"/>
    </style:style>
    <style:style style:name="Tableau22.B" style:family="table-column">
      <style:table-column-properties style:column-width="3.882cm"/>
    </style:style>
    <style:style style:name="Tableau22.C" style:family="table-column">
      <style:table-column-properties style:column-width="3.881cm"/>
    </style:style>
    <style:style style:name="Tableau22.D" style:family="table-column">
      <style:table-column-properties style:column-width="4.516cm"/>
    </style:style>
    <style:style style:name="Tableau22.1" style:family="table-row">
      <style:table-row-properties fo:keep-together="auto"/>
    </style:style>
    <style:style style:name="Tableau22.A1" style:family="table-cell">
      <style:table-cell-properties style:vertical-align="middle" fo:background-color="#0f172a" fo:padding-left="0.247cm" fo:padding-right="0.247cm" fo:padding-top="0.176cm" fo:padding-bottom="0.176cm" fo:border="0.25pt solid #d0d5dd">
        <style:background-image/>
      </style:table-cell-properties>
    </style:style>
    <style:style style:name="Tableau22.A2" style:family="table-cell">
      <style:table-cell-properties style:vertical-align="middle" fo:padding-left="0.247cm" fo:padding-right="0.247cm" fo:padding-top="0.176cm" fo:padding-bottom="0.176cm" fo:border="0.25pt solid #d0d5dd"/>
    </style:style>
    <style:style style:name="Tableau22.B2" style:family="table-cell">
      <style:table-cell-properties style:vertical-align="middle" fo:padding-left="0.247cm" fo:padding-right="0.247cm" fo:padding-top="0.176cm" fo:padding-bottom="0.176cm" fo:border="0.25pt solid #d0d5dd"/>
    </style:style>
    <style:style style:name="Tableau22.C2" style:family="table-cell">
      <style:table-cell-properties style:vertical-align="middle" fo:padding-left="0.247cm" fo:padding-right="0.247cm" fo:padding-top="0.176cm" fo:padding-bottom="0.176cm" fo:border="0.25pt solid #d0d5dd"/>
    </style:style>
    <style:style style:name="Tableau22.D2" style:family="table-cell">
      <style:table-cell-properties style:vertical-align="middle" fo:padding-left="0.247cm" fo:padding-right="0.247cm" fo:padding-top="0.176cm" fo:padding-bottom="0.176cm" fo:border="0.25pt solid #d0d5dd"/>
    </style:style>
    <style:style style:name="Tableau22.A3" style:family="table-cell">
      <style:table-cell-properties style:vertical-align="middle" fo:padding-left="0.247cm" fo:padding-right="0.247cm" fo:padding-top="0.176cm" fo:padding-bottom="0.176cm" fo:border="0.25pt solid #d0d5dd"/>
    </style:style>
    <style:style style:name="Tableau22.B3" style:family="table-cell">
      <style:table-cell-properties style:vertical-align="middle" fo:padding-left="0.247cm" fo:padding-right="0.247cm" fo:padding-top="0.176cm" fo:padding-bottom="0.176cm" fo:border="0.25pt solid #d0d5dd"/>
    </style:style>
    <style:style style:name="Tableau22.C3" style:family="table-cell">
      <style:table-cell-properties style:vertical-align="middle" fo:padding-left="0.247cm" fo:padding-right="0.247cm" fo:padding-top="0.176cm" fo:padding-bottom="0.176cm" fo:border="0.25pt solid #d0d5dd"/>
    </style:style>
    <style:style style:name="Tableau22.D3" style:family="table-cell">
      <style:table-cell-properties style:vertical-align="middle" fo:padding-left="0.247cm" fo:padding-right="0.247cm" fo:padding-top="0.176cm" fo:padding-bottom="0.176cm" fo:border="0.25pt solid #d0d5dd"/>
    </style:style>
    <style:style style:name="Tableau22.A4" style:family="table-cell">
      <style:table-cell-properties style:vertical-align="middle" fo:padding-left="0.247cm" fo:padding-right="0.247cm" fo:padding-top="0.176cm" fo:padding-bottom="0.176cm" fo:border="0.25pt solid #d0d5dd"/>
    </style:style>
    <style:style style:name="Tableau22.B4" style:family="table-cell">
      <style:table-cell-properties style:vertical-align="middle" fo:padding-left="0.247cm" fo:padding-right="0.247cm" fo:padding-top="0.176cm" fo:padding-bottom="0.176cm" fo:border="0.25pt solid #d0d5dd"/>
    </style:style>
    <style:style style:name="Tableau22.C4" style:family="table-cell">
      <style:table-cell-properties style:vertical-align="middle" fo:padding-left="0.247cm" fo:padding-right="0.247cm" fo:padding-top="0.176cm" fo:padding-bottom="0.176cm" fo:border="0.25pt solid #d0d5dd"/>
    </style:style>
    <style:style style:name="Tableau22.D4" style:family="table-cell">
      <style:table-cell-properties style:vertical-align="middle" fo:padding-left="0.247cm" fo:padding-right="0.247cm" fo:padding-top="0.176cm" fo:padding-bottom="0.176cm" fo:border="0.25pt solid #d0d5dd"/>
    </style:style>
    <style:style style:name="Tableau22.A5" style:family="table-cell">
      <style:table-cell-properties style:vertical-align="middle" fo:padding-left="0.247cm" fo:padding-right="0.247cm" fo:padding-top="0.176cm" fo:padding-bottom="0.176cm" fo:border="0.25pt solid #d0d5dd"/>
    </style:style>
    <style:style style:name="Tableau22.B5" style:family="table-cell">
      <style:table-cell-properties style:vertical-align="middle" fo:padding-left="0.247cm" fo:padding-right="0.247cm" fo:padding-top="0.176cm" fo:padding-bottom="0.176cm" fo:border="0.25pt solid #d0d5dd"/>
    </style:style>
    <style:style style:name="Tableau22.C5" style:family="table-cell">
      <style:table-cell-properties style:vertical-align="middle" fo:padding-left="0.247cm" fo:padding-right="0.247cm" fo:padding-top="0.176cm" fo:padding-bottom="0.176cm" fo:border="0.25pt solid #d0d5dd"/>
    </style:style>
    <style:style style:name="Tableau22.D5" style:family="table-cell">
      <style:table-cell-properties style:vertical-align="middle" fo:padding-left="0.247cm" fo:padding-right="0.247cm" fo:padding-top="0.176cm" fo:padding-bottom="0.176cm" fo:border="0.25pt solid #d0d5dd"/>
    </style:style>
    <style:style style:name="P1" style:family="paragraph" style:parent-style-name="Standard">
      <style:paragraph-properties fo:margin-top="0cm" fo:margin-bottom="0.176cm" style:contextual-spacing="false" fo:text-align="center" style:justify-single-word="false"/>
    </style:style>
    <style:style style:name="P2" style:family="paragraph" style:parent-style-name="Standard">
      <style:paragraph-properties fo:margin-top="0cm" fo:margin-bottom="1.058cm" style:contextual-spacing="false"/>
    </style:style>
    <style:style style:name="P3" style:family="paragraph" style:parent-style-name="Standard">
      <style:paragraph-properties fo:margin-top="0cm" fo:margin-bottom="0.141cm" style:contextual-spacing="false" fo:text-align="center" style:justify-single-word="false"/>
    </style:style>
    <style:style style:name="P4" style:family="paragraph" style:parent-style-name="Standard">
      <style:paragraph-properties fo:margin-top="0cm" fo:margin-bottom="1.235cm" style:contextual-spacing="false" fo:text-align="center" style:justify-single-word="false"/>
    </style:style>
    <style:style style:name="P5" style:family="paragraph" style:parent-style-name="Standard">
      <style:paragraph-properties fo:margin-top="0.353cm" fo:margin-bottom="0.353cm" style:contextual-spacing="false" fo:text-align="center" style:justify-single-word="false" fo:padding-left="0cm" fo:padding-right="0cm" fo:padding-top="0.282cm" fo:padding-bottom="0.282cm" fo:border-left="none" fo:border-right="none" fo:border-top="0.99pt solid #0ea5e9" fo:border-bottom="0.99pt solid #0ea5e9"/>
    </style:style>
    <style:style style:name="P6" style:family="paragraph" style:parent-style-name="Standard">
      <style:paragraph-properties fo:margin-top="0.265cm" fo:margin-bottom="0.265cm" style:contextual-spacing="false" fo:text-align="center" style:justify-single-word="false"/>
    </style:style>
    <style:style style:name="P7" style:family="paragraph" style:parent-style-name="Standard">
      <style:paragraph-properties fo:margin-top="0cm" fo:margin-bottom="0.265cm" style:contextual-spacing="false" fo:text-align="center" style:justify-single-word="false"/>
    </style:style>
    <style:style style:name="P8" style:family="paragraph" style:parent-style-name="Standard">
      <style:paragraph-properties fo:margin-top="0cm" fo:margin-bottom="0.353cm" style:contextual-spacing="false" fo:text-align="center" style:justify-single-word="false"/>
    </style:style>
    <style:style style:name="P9" style:family="paragraph" style:parent-style-name="Standard">
      <style:paragraph-properties fo:margin-top="0.353cm" fo:margin-bottom="1.058cm" style:contextual-spacing="false" fo:text-align="center" style:justify-single-word="false" fo:padding-left="0cm" fo:padding-right="0cm" fo:padding-top="0.282cm" fo:padding-bottom="0.282cm" fo:border-left="none" fo:border-right="none" fo:border-top="0.99pt solid #0ea5e9" fo:border-bottom="0.99pt solid #0ea5e9"/>
    </style:style>
    <style:style style:name="P10" style:family="paragraph" style:parent-style-name="Standard">
      <style:paragraph-properties fo:margin-top="0cm" fo:margin-bottom="0.106cm" style:contextual-spacing="false" fo:text-align="start"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margin-top="1.411cm" fo:margin-bottom="0cm" style:contextual-spacing="false"/>
    </style:style>
    <style:style style:name="P13" style:family="paragraph" style:parent-style-name="Standard">
      <style:paragraph-properties fo:margin-top="0cm" fo:margin-bottom="0cm" style:contextual-spacing="false" fo:text-align="center" style:justify-single-word="false"/>
    </style:style>
    <style:style style:name="P14" style:family="paragraph" style:parent-style-name="Heading_20_1" style:master-page-name="Converted1">
      <style:paragraph-properties style:page-number="auto"/>
    </style:style>
    <style:style style:name="P15" style:family="paragraph" style:parent-style-name="Standard">
      <style:text-properties officeooo:paragraph-rsid="000be1b0"/>
    </style:style>
    <style:style style:name="P16" style:family="paragraph" style:parent-style-name="Standard">
      <style:text-properties style:font-name="Times New Roman" officeooo:paragraph-rsid="000be1b0"/>
    </style:style>
    <style:style style:name="P17" style:family="paragraph" style:parent-style-name="Heading_20_1" style:master-page-name="Converted2">
      <style:paragraph-properties style:page-number="auto" fo:break-before="page"/>
    </style:style>
    <style:style style:name="P18" style:family="paragraph" style:parent-style-name="Standard">
      <style:paragraph-properties fo:margin-top="0cm" fo:margin-bottom="0.282cm" style:contextual-spacing="false" fo:line-height="125%" fo:text-align="justify" style:justify-single-word="false" loext:word-spacing-minimum="75%" loext:word-spacing-maximum="133%"/>
    </style:style>
    <style:style style:name="P19" style:family="paragraph" style:parent-style-name="List_20_Paragraph" style:list-style-name="WWNum2">
      <style:paragraph-properties fo:margin-top="0cm" fo:margin-bottom="0.176cm" style:contextual-spacing="false" fo:line-height="121%"/>
    </style:style>
    <style:style style:name="P20" style:family="paragraph" style:parent-style-name="Heading_20_1">
      <style:paragraph-properties fo:break-before="page"/>
    </style:style>
    <style:style style:name="P21" style:family="paragraph" style:parent-style-name="Standard">
      <style:paragraph-properties fo:text-align="center" style:justify-single-word="false"/>
    </style:style>
    <style:style style:name="P22" style:family="paragraph" style:parent-style-name="Standard">
      <style:paragraph-properties fo:margin-top="0.176cm" fo:margin-bottom="0.494cm" style:contextual-spacing="false" fo:text-align="center" style:justify-single-word="false"/>
    </style:style>
    <style:style style:name="P23" style:family="paragraph" style:parent-style-name="Standard">
      <style:paragraph-properties fo:margin-top="0cm" fo:margin-bottom="0.353cm" style:contextual-spacing="false"/>
    </style:style>
    <style:style style:name="P24" style:family="paragraph" style:parent-style-name="Standard">
      <style:paragraph-properties fo:margin-top="0.353cm" fo:margin-bottom="0.141cm" style:contextual-spacing="false" fo:text-align="center" style:justify-single-word="false"/>
    </style:style>
    <style:style style:name="P25" style:family="paragraph" style:parent-style-name="Standard">
      <style:paragraph-properties fo:margin-top="0cm" fo:margin-bottom="0cm" style:contextual-spacing="false" fo:line-height="109%"/>
    </style:style>
    <style:style style:name="P26" style:family="paragraph" style:parent-style-name="List_20_Paragraph" style:list-style-name="WWNum3">
      <style:paragraph-properties fo:margin-top="0cm" fo:margin-bottom="0.176cm" style:contextual-spacing="false" fo:line-height="121%"/>
    </style:style>
    <style:style style:name="P27" style:family="paragraph" style:parent-style-name="Standard">
      <style:paragraph-properties fo:margin-top="0.706cm" fo:margin-bottom="0cm" style:contextual-spacing="false"/>
    </style:style>
    <style:style style:name="P28" style:family="paragraph" style:parent-style-name="Standard">
      <style:paragraph-properties fo:margin-top="0.353cm" fo:margin-bottom="0.353cm" style:contextual-spacing="false" fo:padding-left="0cm" fo:padding-right="0cm" fo:padding-top="0.282cm" fo:padding-bottom="0cm" fo:border-left="none" fo:border-right="none" fo:border-top="0.74pt solid #0ea5e9" fo:border-bottom="none"/>
    </style:style>
    <style:style style:name="T1" style:family="text">
      <style:text-properties fo:color="#0f172a" loext:opacity="100%" fo:font-size="13pt" fo:font-weight="bold" style:font-size-asian="13pt" style:font-weight-asian="bold" style:font-size-complex="13pt" style:font-weight-complex="bold"/>
    </style:style>
    <style:style style:name="T2" style:family="text">
      <style:text-properties fo:color="#6b7280" loext:opacity="100%" fo:font-size="12pt" fo:font-weight="bold" style:font-size-asian="12pt" style:font-weight-asian="bold" style:font-size-complex="12pt" style:font-weight-complex="bold"/>
    </style:style>
    <style:style style:name="T3" style:family="text">
      <style:text-properties fo:color="#6b7280" loext:opacity="100%" fo:font-size="11pt" fo:font-style="italic" style:font-size-asian="11pt" style:font-style-asian="italic" style:font-size-complex="11pt" style:font-style-complex="italic"/>
    </style:style>
    <style:style style:name="T4" style:family="text">
      <style:text-properties fo:color="#0ea5e9" loext:opacity="100%" fo:font-size="16pt" fo:font-weight="bold" style:font-size-asian="16pt" style:font-weight-asian="bold" style:font-size-complex="16pt" style:font-weight-complex="bold"/>
    </style:style>
    <style:style style:name="T5" style:family="text">
      <style:text-properties fo:color="#0f172a" loext:opacity="100%" fo:font-size="20pt" fo:font-weight="bold" style:font-size-asian="20pt" style:font-weight-asian="bold" style:font-size-complex="20pt" style:font-weight-complex="bold"/>
    </style:style>
    <style:style style:name="T6" style:family="text">
      <style:text-properties fo:color="#6b7280" loext:opacity="100%" fo:font-size="12pt" fo:font-style="italic" style:font-size-asian="12pt" style:font-style-asian="italic" style:font-size-complex="12pt" style:font-style-complex="italic"/>
    </style:style>
    <style:style style:name="T7" style:family="text">
      <style:text-properties fo:color="#6b7280" loext:opacity="100%" fo:font-size="11.5pt" fo:font-weight="bold" style:font-size-asian="11.5pt" style:font-weight-asian="bold" style:font-size-complex="11.5pt" style:font-weight-complex="bold"/>
    </style:style>
    <style:style style:name="T8" style:family="text">
      <style:text-properties fo:color="#0f172a" loext:opacity="100%" fo:font-size="12.5pt" fo:font-weight="bold" style:font-size-asian="12.5pt" style:font-weight-asian="bold" style:font-size-complex="12.5pt" style:font-weight-complex="bold"/>
    </style:style>
    <style:style style:name="T9" style:family="text">
      <style:text-properties fo:color="#6b7280" loext:opacity="100%" fo:font-size="11pt" style:font-size-asian="11pt" style:font-size-complex="11pt"/>
    </style:style>
    <style:style style:name="T10" style:family="text">
      <style:text-properties style:font-name="Times New Roman"/>
    </style:style>
    <style:style style:name="T11" style:family="text">
      <style:text-properties fo:font-size="11.5pt" fo:font-style="normal" fo:font-weight="normal" style:font-size-asian="11.5pt" style:font-style-asian="normal" style:font-weight-asian="normal" style:font-size-complex="11.5pt" style:font-style-complex="normal" style:font-weight-complex="normal"/>
    </style:style>
    <style:style style:name="T12" style:family="text">
      <style:text-properties fo:font-size="11.5pt" fo:font-weight="normal" style:font-size-asian="11.5pt" style:font-weight-asian="normal" style:font-size-complex="11.5pt" style:font-weight-complex="normal"/>
    </style:style>
    <style:style style:name="T13" style:family="text">
      <style:text-properties fo:font-size="11.5pt" fo:font-style="normal" fo:font-weight="normal" officeooo:rsid="000be1b0" style:font-size-asian="11.5pt" style:font-style-asian="normal" style:font-weight-asian="normal" style:font-size-complex="11.5pt" style:font-style-complex="normal" style:font-weight-complex="normal"/>
    </style:style>
    <style:style style:name="T14" style:family="text">
      <style:text-properties fo:color="#ffffff" loext:opacity="100%" fo:font-size="10pt" fo:font-weight="bold" style:font-size-asian="10pt" style:font-weight-asian="bold" style:font-size-complex="10pt" style:font-weight-complex="bold"/>
    </style:style>
    <style:style style:name="T15" style:family="text">
      <style:text-properties fo:color="#6b7280" loext:opacity="100%" fo:font-size="9.5pt" fo:font-style="italic" style:font-size-asian="9.5pt" style:font-style-asian="italic" style:font-size-complex="9.5pt" style:font-style-complex="italic"/>
    </style:style>
    <style:style style:name="T16" style:family="text">
      <style:text-properties fo:color="#1f2937" loext:opacity="100%" fo:font-size="10pt" fo:font-weight="bold" style:font-size-asian="10pt" style:font-weight-asian="bold" style:font-size-complex="10pt" style:font-weight-complex="bold"/>
    </style:style>
    <style:style style:name="T17" style:family="text">
      <style:text-properties fo:color="#6b7280" loext:opacity="100%" fo:font-size="10pt" fo:font-style="italic" style:font-size-asian="10pt" style:font-style-asian="italic" style:font-size-complex="10pt" style:font-style-complex="italic"/>
    </style:style>
    <style:style style:name="T18" style:family="text">
      <style:text-properties fo:color="#6b7280" loext:opacity="100%" fo:font-size="14pt" fo:font-weight="bold" style:font-size-asian="14pt" style:font-weight-asian="bold" style:font-size-complex="14pt" style:font-weight-complex="bold"/>
    </style:style>
    <style:style style:name="T19" style:family="text">
      <style:text-properties fo:color="#ffffff" loext:opacity="100%" fo:font-size="10.5pt" fo:font-weight="bold" style:font-size-asian="10.5pt" style:font-weight-asian="bold" style:font-size-complex="10.5pt" style:font-weight-complex="bold"/>
    </style:style>
    <style:style style:name="T20" style:family="text">
      <style:text-properties fo:font-size="10.5pt" fo:font-weight="bold" style:font-size-asian="10.5pt" style:font-weight-asian="bold" style:font-size-complex="10.5pt" style:font-weight-complex="bold"/>
    </style:style>
    <style:style style:name="T21" style:family="text">
      <style:text-properties fo:font-size="10.5pt" fo:font-weight="normal" style:font-size-asian="10.5pt" style:font-weight-asian="normal" style:font-size-complex="10.5pt" style:font-weight-complex="normal"/>
    </style:style>
    <style:style style:name="T22" style:family="text">
      <style:text-properties fo:font-family="Consolas" style:font-family-generic="roman" style:font-pitch="variable" fo:font-size="10.5pt" fo:font-weight="bold" style:font-family-asian="Consolas" style:font-family-generic-asian="system" style:font-pitch-asian="variable" style:font-size-asian="10.5pt" style:font-weight-asian="bold" style:font-family-complex="Consolas" style:font-family-generic-complex="system" style:font-pitch-complex="variable" style:font-size-complex="10.5pt" style:font-weight-complex="bold"/>
    </style:style>
    <style:style style:name="T23" style:family="text">
      <style:text-properties fo:color="#d1fae5" loext:opacity="100%" fo:font-family="Consolas" style:font-family-generic="roman" style:font-pitch="variable" fo:font-size="9.5pt" style:font-family-asian="Consolas" style:font-family-generic-asian="system" style:font-pitch-asian="variable" style:font-size-asian="9.5pt" style:font-family-complex="Consolas" style:font-family-generic-complex="system" style:font-pitch-complex="variable" style:font-size-complex="9.5pt"/>
    </style:style>
    <style:style style:name="T24" style:family="text">
      <style:text-properties fo:font-size="11.5pt" style:font-size-asian="11.5pt" style:font-size-complex="11.5pt"/>
    </style:style>
    <style:style style:name="T25" style:family="text">
      <style:text-properties officeooo:rsid="000afc4e"/>
    </style:style>
    <style:style style:name="T26" style:family="text">
      <style:text-properties officeooo:rsid="000be1b0"/>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logo" text:anchor-type="as-char" svg:width="11.377cm" svg:height="6.324cm" draw:z-index="0"><draw:image xlink:href="Pictures/100000000000026C000001598D07F4E0.png" xlink:type="simple" xlink:show="embed" xlink:actuate="onLoad" draw:mime-type="image/png"/><svg:title>Logo</svg:title><svg:desc>Logo UMI - FST Errachidia</svg:desc></draw:frame></text:p>
      <text:p text:style-name="P2"/>
      <text:p text:style-name="P3"><text:span text:style-name="T1">FACULTÉ DES SCIENCES ET TECHNIQUES D'ERRACHIDIA</text:span></text:p>
      <text:p text:style-name="P3"><text:span text:style-name="T2">Filière : Systèmes Embarqués Intelligents et Télécommunications (SEIT)</text:span></text:p>
      <text:p text:style-name="P4"><text:span text:style-name="T3">Module : Méthodes Numériques</text:span></text:p>
      <text:p text:style-name="P5"/>
      <text:p text:style-name="P6"><text:span text:style-name="T4">RAPPORT DE PROJET</text:span></text:p>
      <text:p text:style-name="P7"><text:span text:style-name="T5">Centre de Contrôle de Médication</text:span></text:p>
      <text:p text:style-name="P8"><text:span text:style-name="T6">Système intelligent de rappel et de suivi de prise de médicaments</text:span></text:p>
      <text:p text:style-name="P9"/>
      <table:table table:name="Tableau1" table:style-name="Tableau1">
        <table:table-column table:style-name="Tableau1.A" table:number-columns-repeated="2"/>
        <table:table-row table:style-name="Tableau1.1">
          <table:table-cell table:style-name="Tableau1.A1" office:value-type="string">
            <text:p text:style-name="P10"><text:span text:style-name="T7">Réalisé par :</text:span></text:p>
            <text:p text:style-name="P11"><text:span text:style-name="T8">Yasir Lasfar</text:span></text:p>
          </table:table-cell>
          <table:table-cell table:style-name="Tableau1.A1" office:value-type="string">
            <text:p text:style-name="P10"><text:span text:style-name="T7">Encadré par :</text:span></text:p>
            <text:p text:style-name="P11"><text:span text:style-name="T8">Pr. N. Mansour</text:span></text:p>
          </table:table-cell>
        </table:table-row>
      </table:table>
      <text:p text:style-name="P12"/>
      <text:p text:style-name="P13"><text:span text:style-name="T9">Année universitaire 2025 / 2026</text:span></text:p>
      <text:h text:style-name="P14" text:outline-level="1">Sommaire</text:h>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loext:content-control loext:plain-text="true" loext:alias="Sommaire"/><text:span text:style-name="Strong_20_Emphasis"><text:span text:style-name="T10">Sommaire</text:span></text:span></text:p>
          <text:p text:style-name="Text_20_body"><text:span text:style-name="Strong_20_Emphasis"><text:span text:style-name="T10">1. Introduction</text:span></text:span><text:span text:style-name="T10"><text:line-break/>  1.1 Contexte et motivation<text:line-break/>  1.2 Objectifs du projet<text:line-break/>  1.3 Organisation du rapport</text:span></text:p>
          <text:p text:style-name="Text_20_body"><text:span text:style-name="Strong_20_Emphasis"><text:span text:style-name="T10">2. Vue d’ensemble du fonctionnement du système</text:span></text:span><text:span text:style-name="T10"><text:line-break/>  2.1 Principe général<text:line-break/>  2.2 Architecture fonctionnelle<text:line-break/>  2.3 Cycle de vie d’un médicament<text:line-break/>  2.4 Acteurs et composants du système</text:span></text:p>
          <text:p text:style-name="Text_20_body"><text:span text:style-name="Strong_20_Emphasis"><text:span text:style-name="T10">3. Environnement de développement et outils utilisés</text:span></text:span><text:span text:style-name="T10"><text:line-break/>  3.1 Langage et framework<text:line-break/>  3.2 Bibliothèques Python utilisées<text:line-break/>  3.3 Technologies front-end<text:line-break/>  3.4 Outils de développement</text:span></text:p>
          <text:p text:style-name="Text_20_body"><text:span text:style-name="Strong_20_Emphasis"><text:span text:style-name="T10">4. Organisation du projet et arborescence des fichiers</text:span></text:span><text:span text:style-name="T10"><text:line-break/>  4.1 Description des fichiers</text:span></text:p>
          <text:p text:style-name="Text_20_body"><text:span text:style-name="Strong_20_Emphasis"><text:span text:style-name="T10">5. Structure et gestion des données (meds.json)</text:span></text:span><text:span text:style-name="T10"><text:line-break/>  5.1 Format des données<text:line-break/>  5.2 Fonctions de chargement et sauvegarde</text:span></text:p>
          <text:p text:style-name="Text_20_body"><text:span text:style-name="Strong_20_Emphasis"><text:span text:style-name="T10">6. Serveur Flask et gestion des routes</text:span></text:span><text:span text:style-name="T10"><text:line-break/>  6.1 Route principale (GET /)<text:line-break/>  6.2 Route d’ajout (POST /add)<text:line-break/>  6.3 Démarrage de l’application<text:line-break/>  6.4 Exécution et logs du serveur</text:span></text:p>
          <text:p text:style-name="Text_20_body"><text:span text:style-name="Strong_20_Emphasis"><text:span text:style-name="T10">7. Système de surveillance et alarme sonore</text:span></text:span><text:span text:style-name="T10"><text:line-break/>  7.1 Fonction check_meds()<text:line-break/>  7.2 Fonction play_alarm()<text:line-break/>  7.3 Algorithme de surveillance</text:span></text:p>
          <text:p text:style-name="Text_20_body"><text:span text:style-name="Strong_20_Emphasis"><text:span text:style-name="T10">8. Module d’envoi de courriels (mailer.py)</text:span></text:span><text:span text:style-name="T10"><text:line-break/>  8.1 Fonctionnement SMTP<text:line-break/>  8.2 Authentification Gmail<text:line-break/>  8.3 Contenu des courriels</text:span></text:p>
          <text:p text:style-name="Text_20_body"><text:span text:style-name="Strong_20_Emphasis"><text:span text:style-name="T10">9. Interface utilisateur (HTML / CSS)</text:span></text:span><text:span text:style-name="T10"><text:line-break/>  9.1 Template Jinja2<text:line-break/></text:span><text:soft-page-break/><text:span text:style-name="T10">  9.2 Design et styles CSS<text:line-break/>  9.3 Aperçu de l’interface</text:span></text:p>
          <text:p text:style-name="Text_20_body"><text:span text:style-name="Strong_20_Emphasis"><text:span text:style-name="T10">10. Tests effectués et résultats obtenus</text:span></text:span><text:span text:style-name="T10"><text:line-break/>  10.1 Scénario de test<text:line-break/>  10.2 Résultats<text:line-break/>  10.3 Validation des fonctionnalités</text:span></text:p>
          <text:p text:style-name="Text_20_body"><text:span text:style-name="Strong_20_Emphasis"><text:span text:style-name="T10">11. Pistes d’amélioration futures</text:span></text:span><text:span text:style-name="T10"><text:line-break/>  11.1 Récurrence quotidienne<text:line-break/>  11.2 Sécurisation des identifiants<text:line-break/>  11.3 Base de données SQLite<text:line-break/>  11.4 Amélioration de l’interface<text:line-break/>  11.5 Notifications multicanales<text:line-break/>  11.6 Déploiement en production</text:span></text:p>
          <text:p text:style-name="Text_20_body"><text:span text:style-name="Strong_20_Emphasis"><text:span text:style-name="T10">12. Conclusion</text:span></text:span></text:p>
          <text:p text:style-name="P16"/>
        </text:index-body>
      </text:table-of-content>
      <text:h text:style-name="P17" text:outline-level="1">1. Introduction</text:h>
      <text:p text:style-name="P18"><text:span text:style-name="T11">L'observance thérapeutique, c'est-à-dire le respect par un patient des horaires et des doses de ses médicaments, constitue un enjeu majeur de santé publique. De nombreuses études montrent qu'une part importante des patients, en particulier les personnes âgées ou celles suivant un traitement à plusieurs médicaments, oublient de prendre leurs médicaments à l'heure prescrite. Ces oublis peuvent avoir des conséquences sérieuses sur l'efficacité du traitement et, dans certains cas, sur la santé du patient.</text:span></text:p>
      <text:p text:style-name="P18"><text:span text:style-name="T11">Dans ce contexte, ce projet propose une solution logicielle simple, accessible et automatisée : le « Centre de Contrôle de Médication » (Medication Control Center). Il s'agit d'une application web développée en Python avec le micro-framework Flask, dont l'objectif est de permettre à un utilisateur d'enregistrer ses médicaments avec leur dosage et leur heure de prise, puis de recevoir automatiquement un rappel sonore et un courriel d'alerte au moment exact où le médicament doit être pris.</text:span></text:p>
      <text:p text:style-name="P18"><text:span text:style-name="T11">Ce projet a été réalisé dans le cadre du module de Méthodes Numériques de la filière Systèmes Embarqués Intelligents et Télécommunications (SEIT) à la Faculté des Sciences et Techniques d'Errachidia, sous l'encadrement du Professeur N. Mansour. Il combine plusieurs notions fondamentales de la programmation : la manipulation de fichiers, la programmation concurrente (threads), le développement web (back-end et front-end), ainsi que la communication réseau via le protocole SMTP pour l'envoi de courriels.</text:span></text:p>
      <text:h text:style-name="Heading_20_2" text:outline-level="2">1.1 Contexte et motivation</text:h>
      <text:p text:style-name="P18"><text:span text:style-name="T11">L'idée de ce projet est née d'un besoin concret : créer un outil capable de surveiller en permanence un ensemble d'horaires de prise de médicaments, sans intervention humaine continue, et de déclencher automatiquement une alerte multicanale (sonore et électronique) lorsque l'heure programmée est atteinte. Plutôt que de s'appuyer sur une simple alarme de téléphone, qui peut être ignorée ou désactivée, l'application met en place un système de suivi persistant : chaque médicament ajouté reste visible dans un tableau de bord, avec un statut clair indiquant s'il a déjà été signalé (« DONE ») ou s'il est encore en attente (« PENDING »).</text:span></text:p>
      <text:h text:style-name="Heading_20_2" text:outline-level="2">1.2 Objectifs du projet</text:h>
      <text:list text:style-name="WWNum2">
        <text:list-item text:start-value="1">
          <text:p text:style-name="P19"><text:span text:style-name="T12">Concevoir une interface web simple permettant d'ajouter un médicament avec son nom, son dosage en milligrammes et son heure de prise.</text:span></text:p>
        </text:list-item>
        <text:list-item>
          <text:p text:style-name="P19"><text:span text:style-name="T12">Stocker ces informations de manière persistante dans un fichier de données structuré (JSON), sans recourir à une base de données complexe.</text:span></text:p>
        </text:list-item>
        <text:list-item>
          <text:p text:style-name="P19"><text:soft-page-break/><text:span text:style-name="T12">Mettre en place un processus de surveillance en arrière-plan qui vérifie en continu si l'heure actuelle correspond à l'heure de prise d'un médicament.</text:span></text:p>
        </text:list-item>
        <text:list-item>
          <text:p text:style-name="P19"><text:span text:style-name="T12">Déclencher automatiquement une alarme sonore locale au moment voulu.</text:span></text:p>
        </text:list-item>
        <text:list-item>
          <text:p text:style-name="P19"><text:span text:style-name="T12">Envoyer automatiquement un courriel de rappel contenant le nom du médicament, le dosage et l'heure prévue.</text:span></text:p>
        </text:list-item>
        <text:list-item>
          <text:p text:style-name="P19"><text:span text:style-name="T12">Mettre à jour dynamiquement le statut de chaque médicament dans l'interface, afin que l'utilisateur sache en un coup d'œil ce qui a déjà été traité.</text:span></text:p>
        </text:list-item>
        <text:list-item>
          <text:p text:style-name="P19"><text:span text:style-name="T12">Appliquer les compétences acquises dans le module de Méthodes Numériques : structuration de l'information, traitement séquentiel, boucles de contrôle, gestion du temps et automatisation.</text:span></text:p>
        </text:list-item>
      </text:list>
      <text:h text:style-name="Heading_20_2" text:outline-level="2">1.3 Organisation du rapport</text:h>
      <text:p text:style-name="P18"><text:span text:style-name="T11">Ce rapport est organisé comme suit. La section 2 décrit le fonctionnement général du système à travers une vue d'ensemble et un schéma de l'architecture. La section 3 détaille l'environnement de développement et les outils utilisés. La section 4 présente l'organisation du projet et l'arborescence des fichiers. Les sections 5 à 9 entrent dans le détail technique : la structure des données, le serveur Flask et les routes, le système de surveillance et d'alarme en arrière-plan, le module d'envoi de courriels, et enfin l'interface utilisateur (HTML/CSS). La section 10 présente les tests effectués et les résultats obtenus, illustrés par des captures d'écran réelles de l'application en fonctionnement. La section 1</text:span><text:span text:style-name="T13">1</text:span><text:span text:style-name="T11"> présente des pistes d'amélioration futures, et la section 1</text:span><text:span text:style-name="T13">2</text:span><text:span text:style-name="T11"> conclut le rapport.</text:span></text:p>
      <text:h text:style-name="P20" text:outline-level="1">2. Vue d'ensemble du fonctionnement du système</text:h>
      <text:p text:style-name="P18"><text:span text:style-name="T11">Avant d'entrer dans les détails techniques du code, il est important de comprendre le fonctionnement général du système à un niveau conceptuel. L'application repose sur trois grandes fonctions qui s'exécutent en parallèle : l'interface web (visible par l'utilisateur), le moteur de surveillance (invisible, qui tourne en arrière-plan), et le système de notification (alarme sonore + courriel).</text:span></text:p>
      <text:h text:style-name="Heading_20_2" text:outline-level="2">2.1 Principe général</text:h>
      <text:p text:style-name="P18"><text:span text:style-name="T11">Concrètement, l'utilisateur ouvre l'application dans son navigateur. Il y voit un formulaire permettant d'ajouter un médicament (nom, dose en mg, heure au format HH:MM) ainsi qu'un tableau listant tous les médicaments déjà enregistrés, avec leur statut. Lorsqu'un médicament est ajouté, il est immédiatement sauvegardé dans un fichier de données (meds.json), avec un statut initial « non envoyé » (sent = false).</text:span></text:p>
      <text:p text:style-name="P18"><text:span text:style-name="T11">En parallèle, dès le démarrage du serveur, un processus de fond (un thread séparé du thread principal) est lancé. Celui-ci exécute une boucle infinie qui se répète toutes les 30 secondes. À chaque itération, ce processus : (1) relit le fichier de données pour obtenir la liste actuelle des médicaments, (2) récupère l'heure actuelle du système au format HH:MM, (3) compare cette heure à l'heure programmée de chaque médicament, et (4) si une correspondance est trouvée et que le médicament n'a pas encore été signalé, déclenche la séquence d'alerte : jouer un son d'alarme et envoyer un courriel. Le statut du médicament est alors mis à jour à sent = true, ce qui évite que l'alerte ne se répète indéfiniment pour le même médicament.</text:span></text:p>
      <text:h text:style-name="Heading_20_2" text:outline-level="2">2.2 Schéma de l'architecture fonctionnelle</text:h>
      <text:p text:style-name="P18"><text:span text:style-name="T11">Le schéma ci-dessous illustre les différents blocs fonctionnels du système et leurs interactions. L'utilisateur interagit uniquement avec l'interface web ; tout le reste (surveillance, alarme, courriel) se déroule de manière autonome et transparente.</text:span></text:p>
      <table:table table:name="Tableau6" table:style-name="Tableau6">
        <table:table-column table:style-name="Tableau6.A" table:number-columns-repeated="3"/>
        <table:table-row table:style-name="Tableau6.1">
          <table:table-cell table:style-name="Tableau6.A1" office:value-type="string">
            <text:p text:style-name="P21"><text:span text:style-name="T14">UTILISATEUR (navigateur)</text:span></text:p>
          </table:table-cell>
          <table:table-cell table:style-name="Tableau6.B1" office:value-type="string">
            <text:p text:style-name="Standard"/>
          </table:table-cell>
          <table:table-cell table:style-name="Tableau6.C1" office:value-type="string">
            <text:p text:style-name="Standard"/>
          </table:table-cell>
        </table:table-row>
        <table:table-row table:style-name="Tableau6.1">
          <table:table-cell table:style-name="Tableau6.A2" table:number-columns-spanned="3" office:value-type="string">
            <text:p text:style-name="P21"><text:span text:style-name="T15">↓ <text:s/>requête HTTP GET / et POST /add</text:span></text:p>
          </table:table-cell>
          <table:covered-table-cell/>
          <table:covered-table-cell/>
        </table:table-row>
        <table:table-row table:style-name="Tableau6.1">
          <table:table-cell table:style-name="Tableau6.A3" table:number-columns-spanned="3" office:value-type="string">
            <table:table table:name="Tableau2" table:style-name="Tableau2">
              <table:table-column table:style-name="Tableau2.A"/>
              <table:table-row table:style-name="Tableau2.1">
                <table:table-cell table:style-name="Tableau2.A1" office:value-type="string">
                  <text:p text:style-name="P21"><text:span text:style-name="T14">SERVEUR FLASK — app.py <text:s/>(routes / et /add)</text:span></text:p>
                </table:table-cell>
              </table:table-row>
            </table:table>
            <text:p text:style-name="Standard"/>
          </table:table-cell>
          <table:covered-table-cell/>
          <table:covered-table-cell/>
        </table:table-row>
        <table:table-row table:style-name="Tableau6.1">
          <table:table-cell table:style-name="Tableau6.A4" table:number-columns-spanned="3" office:value-type="string">
            <text:p text:style-name="P21"><text:span text:style-name="T15">↓ <text:s/>lecture / écriture</text:span></text:p>
          </table:table-cell>
          <table:covered-table-cell/>
          <table:covered-table-cell/>
        </table:table-row>
        <table:table-row table:style-name="Tableau6.1">
          <table:table-cell table:style-name="Tableau6.A5" office:value-type="string">
            <table:table table:name="Tableau3" table:style-name="Tableau3">
              <table:table-column table:style-name="Tableau3.A"/>
              <table:table-row table:style-name="Tableau3.1">
                <table:table-cell table:style-name="Tableau3.A1" office:value-type="string">
                  <text:p text:style-name="P21"><text:span text:style-name="T14">meds.json (stockage)</text:span></text:p>
                </table:table-cell>
              </table:table-row>
            </table:table>
            <text:p text:style-name="Standard"/>
          </table:table-cell>
          <table:table-cell table:style-name="Tableau6.B5" office:value-type="string">
            <text:p text:style-name="Standard"/>
          </table:table-cell>
          <table:table-cell table:style-name="Tableau6.C5" office:value-type="string">
            <table:table table:name="Tableau4" table:style-name="Tableau4">
              <table:table-column table:style-name="Tableau4.A"/>
              <table:table-row table:style-name="Tableau4.1">
                <table:table-cell table:style-name="Tableau4.A1" office:value-type="string">
                  <text:p text:style-name="P21"><text:span text:style-name="T16">Thread check_meds() boucle toutes les 30s</text:span></text:p>
                </table:table-cell>
              </table:table-row>
            </table:table>
            <text:p text:style-name="Standard"/>
          </table:table-cell>
        </table:table-row>
        <table:table-row table:style-name="Tableau6.1">
          <table:table-cell table:style-name="Tableau6.A6" table:number-columns-spanned="3" office:value-type="string">
            <text:p text:style-name="P21"><text:span text:style-name="T15">↓ <text:s/>si heure == heure programmée et sent = false</text:span></text:p>
          </table:table-cell>
          <table:covered-table-cell/>
          <table:covered-table-cell/>
        </table:table-row>
        <text:soft-page-break/>
        <table:table-row table:style-name="Tableau6.1">
          <table:table-cell table:style-name="Tableau6.A7" table:number-columns-spanned="3" office:value-type="string">
            <table:table table:name="Tableau5" table:style-name="Tableau5">
              <table:table-column table:style-name="Tableau5.A" table:number-columns-repeated="2"/>
              <table:table-row table:style-name="Tableau5.1">
                <table:table-cell table:style-name="Tableau5.A1" office:value-type="string">
                  <text:p text:style-name="P21"><text:span text:style-name="T14">🔊 Alarme sonore playsound(alarm.mp3)</text:span></text:p>
                </table:table-cell>
                <table:table-cell table:style-name="Tableau5.B1" office:value-type="string">
                  <text:p text:style-name="P21"><text:span text:style-name="T14">✉️ Courriel SMTP mailer.send_mail()</text:span></text:p>
                </table:table-cell>
              </table:table-row>
            </table:table>
            <text:p text:style-name="Standard"/>
          </table:table-cell>
          <table:covered-table-cell/>
          <table:covered-table-cell/>
        </table:table-row>
      </table:table>
      <text:p text:style-name="P22"><text:span text:style-name="T17">Figure 1 — Architecture fonctionnelle du Centre de Contrôle de Médication</text:span></text:p>
      <text:h text:style-name="Heading_20_2" text:outline-level="2">2.3 Cycle de vie d'un médicament</text:h>
      <text:p text:style-name="P18"><text:span text:style-name="T11">Chaque médicament enregistré dans le système traverse un cycle de vie simple, représenté par les états successifs suivants :</text:span></text:p>
      <table:table table:name="Tableau7" table:style-name="Tableau7">
        <table:table-column table:style-name="Tableau7.A"/>
        <table:table-column table:style-name="Tableau7.B"/>
        <table:table-column table:style-name="Tableau7.C"/>
        <table:table-column table:style-name="Tableau7.B"/>
        <table:table-column table:style-name="Tableau7.E"/>
        <table:table-row table:style-name="Tableau7.1">
          <table:table-cell table:style-name="Tableau7.A1" office:value-type="string">
            <text:p text:style-name="P21"><text:span text:style-name="T14">1. Ajouté (sent = false, PENDING)</text:span></text:p>
          </table:table-cell>
          <table:table-cell table:style-name="Tableau7.B1" office:value-type="string">
            <text:p text:style-name="P21"><text:span text:style-name="T18">→</text:span></text:p>
          </table:table-cell>
          <table:table-cell table:style-name="Tableau7.C1" office:value-type="string">
            <text:p text:style-name="P21"><text:span text:style-name="T14">2. Heure atteinte alarme + courriel déclenchés</text:span></text:p>
          </table:table-cell>
          <table:table-cell table:style-name="Tableau7.D1" office:value-type="string">
            <text:p text:style-name="P21"><text:span text:style-name="T18">→</text:span></text:p>
          </table:table-cell>
          <table:table-cell table:style-name="Tableau7.E1" office:value-type="string">
            <text:p text:style-name="P21"><text:span text:style-name="T14">3. Signalé (sent = true, DONE)</text:span></text:p>
          </table:table-cell>
        </table:table-row>
      </table:table>
      <text:p text:style-name="P22"><text:span text:style-name="T17">Figure 2 — Cycle de vie d'un médicament dans le système</text:span></text:p>
      <text:p text:style-name="P18"><text:span text:style-name="T11">Ce cycle met en évidence une caractéristique importante du système actuel : une fois qu'un médicament est passé à l'état « DONE », il ne redevient jamais « PENDING » automatiquement, même le lendemain à la même heure. Ce point est discuté plus en détail dans la section consacrée à l'analyse critique du projet.</text:span></text:p>
      <text:h text:style-name="Heading_20_2" text:outline-level="2">2.4 Acteurs et composants du système</text:h>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19">Composant</text:span></text:p>
          </table:table-cell>
          <table:table-cell table:style-name="Tableau8.A1" office:value-type="string">
            <text:p text:style-name="Standard"><text:span text:style-name="T19">Rôle dans le système</text:span></text:p>
          </table:table-cell>
        </table:table-row>
        <table:table-row table:style-name="Tableau8.1">
          <table:table-cell table:style-name="Tableau8.A2" office:value-type="string">
            <text:p text:style-name="P11"><text:span text:style-name="T20">Utilisateur</text:span></text:p>
          </table:table-cell>
          <table:table-cell table:style-name="Tableau8.B2" office:value-type="string">
            <text:p text:style-name="P11"><text:span text:style-name="T21">Ajoute des médicaments via le formulaire web et consulte l'état d'avancement des prises.</text:span></text:p>
          </table:table-cell>
        </table:table-row>
        <table:table-row table:style-name="Tableau8.1">
          <table:table-cell table:style-name="Tableau8.A3" office:value-type="string">
            <text:p text:style-name="P11"><text:span text:style-name="T20">Serveur Flask (app.py)</text:span></text:p>
          </table:table-cell>
          <table:table-cell table:style-name="Tableau8.B3" office:value-type="string">
            <text:p text:style-name="P11"><text:span text:style-name="T21">Sert les pages web, traite les requêtes du formulaire, orchestre la sauvegarde des données.</text:span></text:p>
          </table:table-cell>
        </table:table-row>
        <table:table-row table:style-name="Tableau8.1">
          <table:table-cell table:style-name="Tableau8.A4" office:value-type="string">
            <text:p text:style-name="P11"><text:span text:style-name="T20">Fichier meds.json</text:span></text:p>
          </table:table-cell>
          <table:table-cell table:style-name="Tableau8.B4" office:value-type="string">
            <text:p text:style-name="P11"><text:span text:style-name="T21">Base de données légère stockant la liste des médicaments sous forme de tableau JSON.</text:span></text:p>
          </table:table-cell>
        </table:table-row>
        <table:table-row table:style-name="Tableau8.1">
          <table:table-cell table:style-name="Tableau8.A5" office:value-type="string">
            <text:p text:style-name="P11"><text:span text:style-name="T20">Thread de surveillance</text:span></text:p>
          </table:table-cell>
          <table:table-cell table:style-name="Tableau8.B5" office:value-type="string">
            <text:p text:style-name="P11"><text:span text:style-name="T21">Boucle d'arrière-plan vérifiant toutes les 30 secondes si une alerte doit être déclenchée.</text:span></text:p>
          </table:table-cell>
        </table:table-row>
        <table:table-row table:style-name="Tableau8.1">
          <table:table-cell table:style-name="Tableau8.A6" office:value-type="string">
            <text:p text:style-name="P11"><text:span text:style-name="T20">Module alarme (playsound)</text:span></text:p>
          </table:table-cell>
          <table:table-cell table:style-name="Tableau8.B6" office:value-type="string">
            <text:p text:style-name="P11"><text:span text:style-name="T21">Joue un fichier audio (alarm.mp3) pour alerter physiquement l'utilisateur.</text:span></text:p>
          </table:table-cell>
        </table:table-row>
        <table:table-row table:style-name="Tableau8.1">
          <table:table-cell table:style-name="Tableau8.A7" office:value-type="string">
            <text:p text:style-name="P11"><text:span text:style-name="T20">Module mailer.py</text:span></text:p>
          </table:table-cell>
          <table:table-cell table:style-name="Tableau8.B7" office:value-type="string">
            <text:p text:style-name="P11"><text:span text:style-name="T21">Envoie un courriel de rappel via le protocole SMTP (serveur Gmail).</text:span></text:p>
          </table:table-cell>
        </table:table-row>
      </table:table>
      <text:p text:style-name="P23"/>
      <text:h text:style-name="P20" text:outline-level="1">3. Environnement de développement et outils utilisés</text:h>
      <text:h text:style-name="Heading_20_2" text:outline-level="2">3.1 Langage et framework</text:h>
      <text:p text:style-name="P18"><text:span text:style-name="T11">Le projet est entièrement développé en Python 3.11, choisi pour sa simplicité de syntaxe et la richesse de son écosystème de bibliothèques. La partie serveur repose sur Flask, un micro-framework web léger qui permet de définir rapidement des routes HTTP (URLs) et de générer des pages HTML dynamiques grâce à son moteur de template intégré, Jinja2.</text:span></text:p>
      <text:h text:style-name="Heading_20_2" text:outline-level="2">3.2 Bibliothèques et modules Python utilisés</text:h>
      <table:table table:name="Tableau9" table:style-name="Tableau9">
        <table:table-column table:style-name="Tableau9.A"/>
        <table:table-column table:style-name="Tableau9.B"/>
        <table:table-row table:style-name="Tableau9.1">
          <table:table-cell table:style-name="Tableau9.A1" office:value-type="string">
            <text:p text:style-name="Standard"><text:span text:style-name="T19">Module</text:span></text:p>
          </table:table-cell>
          <table:table-cell table:style-name="Tableau9.A1" office:value-type="string">
            <text:p text:style-name="Standard"><text:span text:style-name="T19">Rôle dans le projet</text:span></text:p>
          </table:table-cell>
        </table:table-row>
        <table:table-row table:style-name="Tableau9.1">
          <table:table-cell table:style-name="Tableau9.A2" office:value-type="string">
            <text:p text:style-name="P11"><text:span text:style-name="T22">flask</text:span></text:p>
          </table:table-cell>
          <table:table-cell table:style-name="Tableau9.B2" office:value-type="string">
            <text:p text:style-name="P11"><text:span text:style-name="T21">Framework web : gestion des routes, du rendu HTML (Jinja2) et des requêtes HTTP (GET/POST).</text:span></text:p>
          </table:table-cell>
        </table:table-row>
        <table:table-row table:style-name="Tableau9.1">
          <table:table-cell table:style-name="Tableau9.A3" office:value-type="string">
            <text:p text:style-name="P11"><text:span text:style-name="T22">json</text:span></text:p>
          </table:table-cell>
          <table:table-cell table:style-name="Tableau9.B3" office:value-type="string">
            <text:p text:style-name="P11"><text:span text:style-name="T21">Lecture et écriture des données des médicaments au format JSON dans le fichier meds.json.</text:span></text:p>
          </table:table-cell>
        </table:table-row>
        <table:table-row table:style-name="Tableau9.1">
          <table:table-cell table:style-name="Tableau9.A4" office:value-type="string">
            <text:p text:style-name="P11"><text:span text:style-name="T22">threading</text:span></text:p>
          </table:table-cell>
          <table:table-cell table:style-name="Tableau9.B4" office:value-type="string">
            <text:p text:style-name="P11"><text:span text:style-name="T21">Exécution de la boucle de surveillance (check_meds) en parallèle du serveur web, sans bloquer l'interface.</text:span></text:p>
          </table:table-cell>
        </table:table-row>
        <table:table-row table:style-name="Tableau9.1">
          <table:table-cell table:style-name="Tableau9.A5" office:value-type="string">
            <text:p text:style-name="P11"><text:span text:style-name="T22">time</text:span></text:p>
          </table:table-cell>
          <table:table-cell table:style-name="Tableau9.B5" office:value-type="string">
            <text:p text:style-name="P11"><text:span text:style-name="T21">Gestion des pauses (time.sleep) entre deux vérifications, et durée d'activation de l'alarme.</text:span></text:p>
          </table:table-cell>
        </table:table-row>
        <table:table-row table:style-name="Tableau9.1">
          <table:table-cell table:style-name="Tableau9.A6" office:value-type="string">
            <text:p text:style-name="P11"><text:span text:style-name="T22">datetime</text:span></text:p>
          </table:table-cell>
          <table:table-cell table:style-name="Tableau9.B6" office:value-type="string">
            <text:p text:style-name="P11"><text:span text:style-name="T21">Récupération de l'heure système actuelle, formatée en chaîne « HH:MM » pour comparaison.</text:span></text:p>
          </table:table-cell>
        </table:table-row>
        <table:table-row table:style-name="Tableau9.1">
          <table:table-cell table:style-name="Tableau9.A7" office:value-type="string">
            <text:p text:style-name="P11"><text:span text:style-name="T22">playsound</text:span></text:p>
          </table:table-cell>
          <table:table-cell table:style-name="Tableau9.B7" office:value-type="string">
            <text:p text:style-name="P11"><text:span text:style-name="T21">Lecture du fichier audio alarm.mp3 pour produire l'alerte sonore locale.</text:span></text:p>
          </table:table-cell>
        </table:table-row>
        <table:table-row table:style-name="Tableau9.1">
          <table:table-cell table:style-name="Tableau9.A8" office:value-type="string">
            <text:p text:style-name="P11"><text:span text:style-name="T22">smtplib</text:span></text:p>
          </table:table-cell>
          <table:table-cell table:style-name="Tableau9.B8" office:value-type="string">
            <text:p text:style-name="P11"><text:span text:style-name="T21">Connexion sécurisée (SSL) à un serveur SMTP (Gmail) pour l'envoi de courriels.</text:span></text:p>
          </table:table-cell>
        </table:table-row>
        <table:table-row table:style-name="Tableau9.1">
          <table:table-cell table:style-name="Tableau9.A9" office:value-type="string">
            <text:p text:style-name="P11"><text:span text:style-name="T22">email.mime.text</text:span></text:p>
          </table:table-cell>
          <table:table-cell table:style-name="Tableau9.B9" office:value-type="string">
            <text:p text:style-name="P11"><text:span text:style-name="T21">Construction du message électronique (sujet, corps, expéditeur, destinataire) au format MIME.</text:span></text:p>
          </table:table-cell>
        </table:table-row>
      </table:table>
      <text:p text:style-name="P23"/>
      <text:h text:style-name="Heading_20_2" text:outline-level="2">3.3 Technologies front-end</text:h>
      <text:list text:continue-numbering="true" text:style-name="WWNum2">
        <text:list-item>
          <text:p text:style-name="P19"><text:span text:style-name="T12">HTML5 : structure de la page unique de l'application (index.html), avec un formulaire et un tableau dynamique généré par Jinja2.</text:span></text:p>
        </text:list-item>
        <text:list-item>
          <text:p text:style-name="P19"><text:span text:style-name="T12">CSS3 : mise en forme visuelle (style.css), incluant un dégradé de couleurs animé en arrière-plan, un tableau avec effet de transparence (glassmorphism), et des indicateurs de statut colorés.</text:span></text:p>
        </text:list-item>
        <text:list-item>
          <text:p text:style-name="P19"><text:span text:style-name="T12">Jinja2 (intégré à Flask) : moteur de templates permettant d'injecter dynamiquement la liste des médicaments dans le HTML via les boucles {% for %} et les conditions {% if %}.</text:span></text:p>
        </text:list-item>
      </text:list>
      <text:h text:style-name="Heading_20_2" text:outline-level="2"><text:soft-page-break/>3.4 Outils de développement</text:h>
      <text:list xml:id="list210706903007250" text:continue-numbering="true" text:style-name="WWNum2">
        <text:list-item>
          <text:p text:style-name="P19"><text:span text:style-name="T12">Visual Studio Code : éditeur de code utilisé pour écrire et organiser l'ensemble du projet.</text:span></text:p>
        </text:list-item>
        <text:list-item>
          <text:p text:style-name="P19"><text:span text:style-name="T12">PowerShell (Windows) : terminal utilisé pour lancer le serveur Flask (commande python app.py) et consulter les journaux d'exécution (logs).</text:span></text:p>
        </text:list-item>
        <text:list-item>
          <text:p text:style-name="P19"><text:span text:style-name="T12">Compte Gmail dédié : utilisé comme expéditeur SMTP pour l'envoi automatique des courriels de rappel, avec un mot de passe d'application généré spécifiquement pour cet usage.</text:span></text:p>
        </text:list-item>
      </text:list>
      <text:h text:style-name="P20" text:outline-level="1">4. Organisation du projet et arborescence des fichiers</text:h>
      <text:p text:style-name="P18"><text:span text:style-name="T11">Le projet suit une structure de répertoires classique pour une application Flask, séparant clairement le code Python, les ressources statiques (CSS) et les templates HTML. La capture d'écran ci-dessous montre l'arborescence réelle du projet telle qu'organisée dans l'explorateur de fichiers de Visual Studio Code.</text:span></text:p>
      <text:p text:style-name="P24"><draw:frame draw:style-name="fr1" draw:name="figure" text:anchor-type="as-char" svg:width="6.879cm" svg:height="9.843cm" draw:z-index="1"><draw:image xlink:href="Pictures/100000010000012E000001AF27336452.png" xlink:type="simple" xlink:show="embed" xlink:actuate="onLoad" draw:mime-type="image/png"/><svg:title>Figure</svg:title><svg:desc>Capture d'écran du projet</svg:desc></draw:frame></text:p>
      <text:p text:style-name="P22"><text:span text:style-name="T17">Figure 3 — Arborescence du projet dans Visual Studio Code</text:span></text:p>
      <text:h text:style-name="Heading_20_2" text:outline-level="2">4.1 Description des fichiers</text:h>
      <table:table table:name="Tableau10" table:style-name="Tableau10">
        <table:table-column table:style-name="Tableau10.A"/>
        <table:table-column table:style-name="Tableau10.B"/>
        <table:table-row table:style-name="Tableau10.1">
          <table:table-cell table:style-name="Tableau10.A1" office:value-type="string">
            <text:p text:style-name="Standard"><text:span text:style-name="T19">Fichier / Dossier</text:span></text:p>
          </table:table-cell>
          <table:table-cell table:style-name="Tableau10.A1" office:value-type="string">
            <text:p text:style-name="Standard"><text:span text:style-name="T19">Description</text:span></text:p>
          </table:table-cell>
        </table:table-row>
        <table:table-row table:style-name="Tableau10.1">
          <table:table-cell table:style-name="Tableau10.A2" office:value-type="string">
            <text:p text:style-name="P11"><text:span text:style-name="T22">app.py</text:span></text:p>
          </table:table-cell>
          <table:table-cell table:style-name="Tableau10.B2" office:value-type="string">
            <text:p text:style-name="P11"><text:span text:style-name="T21">Point d'entrée de l'application. Contient le serveur Flask, les routes web, ainsi que la logique de surveillance et de déclenchement des alarmes.</text:span></text:p>
          </table:table-cell>
        </table:table-row>
        <table:table-row table:style-name="Tableau10.1">
          <table:table-cell table:style-name="Tableau10.A3" office:value-type="string">
            <text:p text:style-name="P11"><text:span text:style-name="T22">mailer.py</text:span></text:p>
          </table:table-cell>
          <table:table-cell table:style-name="Tableau10.B3" office:value-type="string">
            <text:p text:style-name="P11"><text:span text:style-name="T21">Module dédié à l'envoi de courriels via le protocole SMTP, isolé du reste de la logique applicative.</text:span></text:p>
          </table:table-cell>
        </table:table-row>
        <table:table-row table:style-name="Tableau10.1">
          <table:table-cell table:style-name="Tableau10.A4" office:value-type="string">
            <text:p text:style-name="P11"><text:span text:style-name="T22">meds.json</text:span></text:p>
          </table:table-cell>
          <table:table-cell table:style-name="Tableau10.B4" office:value-type="string">
            <text:p text:style-name="P11"><text:span text:style-name="T21">Fichier de données contenant la liste des médicaments enregistrés, au format JSON.</text:span></text:p>
          </table:table-cell>
        </table:table-row>
        <table:table-row table:style-name="Tableau10.1">
          <table:table-cell table:style-name="Tableau10.A5" office:value-type="string">
            <text:p text:style-name="P11"><text:span text:style-name="T22">alarm.mp3</text:span></text:p>
          </table:table-cell>
          <table:table-cell table:style-name="Tableau10.B5" office:value-type="string">
            <text:p text:style-name="P11"><text:span text:style-name="T21">Fichier audio joué lors du déclenchement d'une alerte de prise de médicament.</text:span></text:p>
          </table:table-cell>
        </table:table-row>
        <table:table-row table:style-name="Tableau10.1">
          <table:table-cell table:style-name="Tableau10.A6" office:value-type="string">
            <text:p text:style-name="P11"><text:span text:style-name="T22">templates/</text:span><text:soft-page-break/><text:span text:style-name="T22">index.html</text:span></text:p>
          </table:table-cell>
          <table:table-cell table:style-name="Tableau10.B6" office:value-type="string">
            <text:p text:style-name="P11"><text:span text:style-name="T21">Template Jinja2 affichant le formulaire d'ajout et le tableau des médicaments </text:span><text:soft-page-break/><text:span text:style-name="T21">avec leur statut.</text:span></text:p>
          </table:table-cell>
        </table:table-row>
        <table:table-row table:style-name="Tableau10.1">
          <table:table-cell table:style-name="Tableau10.A7" office:value-type="string">
            <text:p text:style-name="P11"><text:span text:style-name="T22">static/style.css</text:span></text:p>
          </table:table-cell>
          <table:table-cell table:style-name="Tableau10.B7" office:value-type="string">
            <text:p text:style-name="P11"><text:span text:style-name="T21">Feuille de style définissant l'apparence visuelle de l'application (couleurs, animations, mise en page).</text:span></text:p>
          </table:table-cell>
        </table:table-row>
        <table:table-row table:style-name="Tableau10.1">
          <table:table-cell table:style-name="Tableau10.A8" office:value-type="string">
            <text:p text:style-name="P11"><text:span text:style-name="T22">ui.py / utils.py</text:span></text:p>
          </table:table-cell>
          <table:table-cell table:style-name="Tableau10.B8" office:value-type="string">
            <text:p text:style-name="P11"><text:span text:style-name="T21">Fichiers réservés pour une future séparation du code (interface et fonctions utilitaires) ; actuellement vides, anticipant une refactorisation du projet.</text:span></text:p>
          </table:table-cell>
        </table:table-row>
        <table:table-row table:style-name="Tableau10.1">
          <table:table-cell table:style-name="Tableau10.A9" office:value-type="string">
            <text:p text:style-name="P11"><text:span text:style-name="T22">__pycache__/</text:span></text:p>
          </table:table-cell>
          <table:table-cell table:style-name="Tableau10.B9" office:value-type="string">
            <text:p text:style-name="P11"><text:span text:style-name="T21">Dossier généré automatiquement par Python, contenant les fichiers bytecode compilés (.pyc) pour accélérer le chargement des modules.</text:span></text:p>
          </table:table-cell>
        </table:table-row>
      </table:table>
      <text:p text:style-name="P23"/>
      <text:p text:style-name="P18"><text:span text:style-name="T11">Cette organisation modulaire, bien que le projet reste de taille modeste, présente l'avantage de séparer les responsabilités : la logique d'envoi de courriel (mailer.py) est indépendante du reste de l'application, ce qui facilite sa réutilisation ou son remplacement futur (par exemple par un envoi de SMS) sans modifier le fichier principal app.py.</text:span></text:p>
      <text:h text:style-name="P20" text:outline-level="1">5. Structure et gestion des données (meds.json)</text:h>
      <text:p text:style-name="P18"><text:span text:style-name="T11">Plutôt que d'utiliser un système de gestion de base de données relationnelle (comme SQLite ou MySQL), qui serait surdimensionné pour les besoins de ce projet, les données sont stockées dans un simple fichier texte au format JSON (JavaScript Object Notation). Ce choix correspond à une approche pédagogique adaptée à un projet de méthodes numériques, où l'accent est mis sur la logique algorithmique plutôt que sur l'administration d'un serveur de base de données.</text:span></text:p>
      <text:h text:style-name="Heading_20_2" text:outline-level="2">5.1 Format des données</text:h>
      <text:p text:style-name="P18"><text:span text:style-name="T11">Chaque médicament est représenté par un objet JSON comportant quatre attributs :</text:span></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Standard"><text:span text:style-name="T19">Clé</text:span></text:p>
          </table:table-cell>
          <table:table-cell table:style-name="Tableau11.A1" office:value-type="string">
            <text:p text:style-name="Standard"><text:span text:style-name="T19">Type</text:span></text:p>
          </table:table-cell>
          <table:table-cell table:style-name="Tableau11.A1" office:value-type="string">
            <text:p text:style-name="Standard"><text:span text:style-name="T19">Description</text:span></text:p>
          </table:table-cell>
        </table:table-row>
        <table:table-row table:style-name="Tableau11.1">
          <table:table-cell table:style-name="Tableau11.A2" office:value-type="string">
            <text:p text:style-name="P11"><text:span text:style-name="T22">name</text:span></text:p>
          </table:table-cell>
          <table:table-cell table:style-name="Tableau11.B2" office:value-type="string">
            <text:p text:style-name="P11"><text:span text:style-name="T21">chaîne (str)</text:span></text:p>
          </table:table-cell>
          <table:table-cell table:style-name="Tableau11.C2" office:value-type="string">
            <text:p text:style-name="P11"><text:span text:style-name="T21">Nom du médicament saisi par l'utilisateur (ex. : « Dolipran »).</text:span></text:p>
          </table:table-cell>
        </table:table-row>
        <table:table-row table:style-name="Tableau11.1">
          <table:table-cell table:style-name="Tableau11.A3" office:value-type="string">
            <text:p text:style-name="P11"><text:span text:style-name="T22">mg</text:span></text:p>
          </table:table-cell>
          <table:table-cell table:style-name="Tableau11.B3" office:value-type="string">
            <text:p text:style-name="P11"><text:span text:style-name="T21">chaîne (str)</text:span></text:p>
          </table:table-cell>
          <table:table-cell table:style-name="Tableau11.C3" office:value-type="string">
            <text:p text:style-name="P11"><text:span text:style-name="T21">Dosage en milligrammes, conservé sous forme de texte tel que saisi dans le formulaire.</text:span></text:p>
          </table:table-cell>
        </table:table-row>
        <table:table-row table:style-name="Tableau11.1">
          <table:table-cell table:style-name="Tableau11.A4" office:value-type="string">
            <text:p text:style-name="P11"><text:span text:style-name="T22">time</text:span></text:p>
          </table:table-cell>
          <table:table-cell table:style-name="Tableau11.B4" office:value-type="string">
            <text:p text:style-name="P11"><text:span text:style-name="T21">chaîne (str)</text:span></text:p>
          </table:table-cell>
          <table:table-cell table:style-name="Tableau11.C4" office:value-type="string">
            <text:p text:style-name="P11"><text:span text:style-name="T21">Heure de prise au format « HH:MM » (ex. : « 20:18 »), utilisée pour la comparaison avec l'heure système.</text:span></text:p>
          </table:table-cell>
        </table:table-row>
        <table:table-row table:style-name="Tableau11.1">
          <table:table-cell table:style-name="Tableau11.A5" office:value-type="string">
            <text:p text:style-name="P11"><text:span text:style-name="T22">sent</text:span></text:p>
          </table:table-cell>
          <table:table-cell table:style-name="Tableau11.B5" office:value-type="string">
            <text:p text:style-name="P11"><text:span text:style-name="T21">booléen</text:span></text:p>
          </table:table-cell>
          <table:table-cell table:style-name="Tableau11.C5" office:value-type="string">
            <text:p text:style-name="P11"><text:span text:style-name="T21">Indique si l'alerte (son + courriel) a déjà été déclenchée pour ce médicament (true) ou non (false).</text:span></text:p>
          </table:table-cell>
        </table:table-row>
      </table:table>
      <text:p text:style-name="P23"/>
      <text:p text:style-name="P18"><text:span text:style-name="T11">Voici un extrait réel du fichier meds.json après l'ajout de plusieurs médicaments et leur traitement par le système :</text:span></text:p>
      <table:table table:name="Tableau12" table:style-name="Tableau12">
        <table:table-column table:style-name="Tableau12.A"/>
        <table:table-row table:style-name="Tableau12.1">
          <table:table-cell table:style-name="Tableau12.A1" office:value-type="string">
            <text:p text:style-name="P25"><text:span text:style-name="T23">[</text:span></text:p>
            <text:p text:style-name="P25"><text:span text:style-name="T23"><text:s text:c="4"/>{</text:span></text:p>
            <text:p text:style-name="P25"><text:span text:style-name="T23"><text:s text:c="8"/>"name": "Dolipran",</text:span></text:p>
            <text:p text:style-name="P25"><text:span text:style-name="T23"><text:s text:c="8"/>"mg": "88",</text:span></text:p>
            <text:p text:style-name="P25"><text:span text:style-name="T23"><text:s text:c="8"/>"time": "20:18",</text:span></text:p>
            <text:p text:style-name="P25"><text:span text:style-name="T23"><text:s text:c="8"/>"sent": true</text:span></text:p>
            <text:p text:style-name="P25"><text:span text:style-name="T23"><text:s text:c="4"/>},</text:span></text:p>
            <text:p text:style-name="P25"><text:span text:style-name="T23"><text:s text:c="4"/>{</text:span></text:p>
            <text:p text:style-name="P25"><text:span text:style-name="T23"><text:s text:c="8"/>"name": "Surgam ",</text:span></text:p>
            <text:p text:style-name="P25"><text:span text:style-name="T23"><text:s text:c="8"/>"mg": "200",</text:span></text:p>
            <text:p text:style-name="P25"><text:span text:style-name="T23"><text:s text:c="8"/>"time": "20:22",</text:span></text:p>
            <text:p text:style-name="P25"><text:span text:style-name="T23"><text:s text:c="8"/>"sent": true</text:span></text:p>
            <text:p text:style-name="P25"><text:span text:style-name="T23"><text:s text:c="4"/>},</text:span></text:p>
            <text:p text:style-name="P25"><text:span text:style-name="T23"><text:s text:c="4"/>{</text:span></text:p>
            <text:p text:style-name="P25"><text:span text:style-name="T23"><text:s text:c="8"/>"name": "aspro",</text:span></text:p>
            <text:p text:style-name="P25"><text:span text:style-name="T23"><text:s text:c="8"/>"mg": "50",</text:span></text:p>
            <text:p text:style-name="P25"><text:span text:style-name="T23"><text:s text:c="8"/>"time": "20:24",</text:span></text:p>
            <text:p text:style-name="P25"><text:soft-page-break/><text:span text:style-name="T23"><text:s text:c="8"/>"sent": true</text:span></text:p>
            <text:p text:style-name="P25"><text:span text:style-name="T23"><text:s text:c="4"/>},</text:span></text:p>
            <text:p text:style-name="P25"><text:span text:style-name="T23"><text:s text:c="4"/>{</text:span></text:p>
            <text:p text:style-name="P25"><text:span text:style-name="T23"><text:s text:c="8"/>"name": "Renomicile",</text:span></text:p>
            <text:p text:style-name="P25"><text:span text:style-name="T23"><text:s text:c="8"/>"mg": "500",</text:span></text:p>
            <text:p text:style-name="P25"><text:span text:style-name="T23"><text:s text:c="8"/>"time": "20:28",</text:span></text:p>
            <text:p text:style-name="P25"><text:span text:style-name="T23"><text:s text:c="8"/>"sent": true</text:span></text:p>
            <text:p text:style-name="P25"><text:span text:style-name="T23"><text:s text:c="4"/>}</text:span></text:p>
            <text:p text:style-name="P25"><text:span text:style-name="T23">]</text:span></text:p>
          </table:table-cell>
        </table:table-row>
      </table:table>
      <text:h text:style-name="Heading_20_2" text:outline-level="2">5.2 Fonctions de chargement et de sauvegarde</text:h>
      <text:p text:style-name="P18"><text:span text:style-name="T11">Deux fonctions principales gèrent l'accès au fichier de données : load_meds() pour la lecture et save_meds() pour l'écriture. Elles sont définies dans app.py et appelées à chaque fois qu'une opération de lecture ou de modification est nécessaire.</text:span></text:p>
      <table:table table:name="Tableau13" table:style-name="Tableau13">
        <table:table-column table:style-name="Tableau13.A"/>
        <table:table-row table:style-name="Tableau13.1">
          <table:table-cell table:style-name="Tableau13.A1" office:value-type="string">
            <text:p text:style-name="P25"><text:span text:style-name="T23">def load_meds():</text:span></text:p>
            <text:p text:style-name="P25"><text:span text:style-name="T23"><text:s text:c="4"/>try:</text:span></text:p>
            <text:p text:style-name="P25"><text:span text:style-name="T23"><text:s text:c="8"/>with open("meds.json", "r") as f:</text:span></text:p>
            <text:p text:style-name="P25"><text:span text:style-name="T23"><text:s text:c="12"/>content = f.read().strip()</text:span></text:p>
            <text:p text:style-name="P25"><text:span text:style-name="T23"><text:s text:c="12"/>if not content:</text:span></text:p>
            <text:p text:style-name="P25"><text:span text:style-name="T23"><text:s text:c="16"/>return []</text:span></text:p>
            <text:p text:style-name="P25"><text:span text:style-name="T23"><text:s text:c="12"/>return json.loads(content)</text:span></text:p>
            <text:p text:style-name="P25"><text:span text:style-name="T23"><text:s text:c="4"/>except:</text:span></text:p>
            <text:p text:style-name="P25"><text:span text:style-name="T23"><text:s text:c="8"/>return []</text:span></text:p>
            <text:p text:style-name="P25"><text:span text:style-name="T23"><text:s/></text:span></text:p>
            <text:p text:style-name="P25"><text:span text:style-name="T23">def save_meds(meds):</text:span></text:p>
            <text:p text:style-name="P25"><text:span text:style-name="T23"><text:s text:c="4"/>with open("meds.json", "w") as f:</text:span></text:p>
            <text:p text:style-name="P25"><text:span text:style-name="T23"><text:s text:c="8"/>json.dump(meds, f, indent=4)</text:span></text:p>
          </table:table-cell>
        </table:table-row>
      </table:table>
      <text:p text:style-name="P18"><text:span text:style-name="T11">La fonction load_meds() ouvre le fichier en mode lecture, vérifie qu'il n'est pas vide (pour éviter une erreur de parsing JSON sur un fichier vide), puis convertit son contenu textuel en une liste de dictionnaires Python grâce à json.loads(). Le bloc try/except englobant permet de renvoyer une liste vide en cas d'erreur (fichier inexistant, JSON corrompu, etc.), ce qui rend le système plus robuste face à un démarrage initial où le fichier n'existe pas encore.</text:span></text:p>
      <text:p text:style-name="P18"><text:span text:style-name="T11">La fonction save_meds() effectue l'opération inverse : elle reçoit la liste complète des médicaments (avec leurs éventuelles modifications) et la réécrit intégralement dans le fichier, avec une indentation de 4 espaces (indent=4) pour conserver une présentation lisible. Il est important de noter que cette approche réécrit l'intégralité du fichier à chaque sauvegarde, ce qui est acceptable pour un faible volume de données, mais deviendrait inefficace si le nombre de médicaments augmentait considérablement.</text:span></text:p>
      <text:h text:style-name="P20" text:outline-level="1">6. Le serveur Flask et la gestion des routes</text:h>
      <text:p text:style-name="P18"><text:span text:style-name="T11">Le cœur de l'application web repose sur deux routes HTTP définies grâce au décorateur @app.route() de Flask. Ces routes constituent les points d'entrée par lesquels le navigateur communique avec le serveur.</text:span></text:p>
      <text:h text:style-name="Heading_20_2" text:outline-level="2">6.1 Route d'affichage principale (GET /)</text:h>
      <table:table table:name="Tableau14" table:style-name="Tableau14">
        <table:table-column table:style-name="Tableau14.A"/>
        <table:table-row table:style-name="Tableau14.1">
          <table:table-cell table:style-name="Tableau14.A1" office:value-type="string">
            <text:p text:style-name="P25"><text:span text:style-name="T23">@app.route("/")</text:span></text:p>
            <text:p text:style-name="P25"><text:span text:style-name="T23">def index():</text:span></text:p>
            <text:p text:style-name="P25"><text:span text:style-name="T23"><text:s text:c="4"/>return render_template("index.html", meds=load_meds())</text:span></text:p>
          </table:table-cell>
        </table:table-row>
      </table:table>
      <text:p text:style-name="P18"><text:span text:style-name="T11">Cette route répond aux requêtes GET sur l'URL racine du site. Elle appelle la fonction load_meds() pour récupérer la liste actuelle des médicaments, puis transmet cette liste au moteur de templates Jinja2 via render_template(). Le fichier index.html peut alors itérer sur cette liste pour construire dynamiquement le tableau affiché à l'écran.</text:span></text:p>
      <text:h text:style-name="Heading_20_2" text:outline-level="2">6.2 Route d'ajout d'un médicament (POST /add)</text:h>
      <table:table table:name="Tableau15" table:style-name="Tableau15">
        <table:table-column table:style-name="Tableau15.A"/>
        <table:table-row table:style-name="Tableau15.1">
          <table:table-cell table:style-name="Tableau15.A1" office:value-type="string">
            <text:p text:style-name="P25"><text:span text:style-name="T23">@app.route("/add", methods=["POST"])</text:span></text:p>
            <text:p text:style-name="P25"><text:span text:style-name="T23">def add():</text:span></text:p>
            <text:p text:style-name="P25"><text:span text:style-name="T23"><text:s text:c="4"/>med = {</text:span></text:p>
            <text:p text:style-name="P25"><text:span text:style-name="T23"><text:s text:c="8"/>"name": request.form["name"],</text:span></text:p>
            <text:p text:style-name="P25"><text:span text:style-name="T23"><text:s text:c="8"/>"mg": request.form["mg"],</text:span></text:p>
            <text:p text:style-name="P25"><text:span text:style-name="T23"><text:s text:c="8"/>"time": request.form["time"],</text:span></text:p>
            <text:p text:style-name="P25"><text:span text:style-name="T23"><text:s text:c="8"/>"sent": False</text:span></text:p>
            <text:p text:style-name="P25"><text:span text:style-name="T23"><text:s text:c="4"/>}</text:span></text:p>
            <text:p text:style-name="P25"><text:span text:style-name="T23"><text:s/></text:span></text:p>
            <text:p text:style-name="P25"><text:span text:style-name="T23"><text:s text:c="4"/>meds = load_meds()</text:span></text:p>
            <text:p text:style-name="P25"><text:span text:style-name="T23"><text:s text:c="4"/>meds.append(med)</text:span></text:p>
            <text:p text:style-name="P25"><text:span text:style-name="T23"><text:s text:c="4"/>save_meds(meds)</text:span></text:p>
            <text:p text:style-name="P25"><text:span text:style-name="T23"><text:s/></text:span></text:p>
            <text:p text:style-name="P25"><text:span text:style-name="T23"><text:s text:c="4"/>return redirect("/")</text:span></text:p>
          </table:table-cell>
        </table:table-row>
      </table:table>
      <text:p text:style-name="P18"><text:span text:style-name="T11">Cette route ne traite que les requêtes POST, envoyées par le formulaire HTML lorsque l'utilisateur clique sur le bouton « Add ». Elle extrait les trois champs du formulaire (name, mg, time) via l'objet request.form, construit un nouveau dictionnaire représentant le médicament avec le statut initial sent = False, puis l'ajoute à la liste existante avant de la sauvegarder. Enfin, la fonction redirige l'utilisateur vers la page d'accueil (redirect("/")), ce qui provoque un rafraîchissement de la page et l'affichage immédiat du nouveau médicament dans le tableau.</text:span></text:p>
      <text:h text:style-name="Heading_20_2" text:outline-level="2"><text:soft-page-break/>6.3 Démarrage de l'application</text:h>
      <text:p text:style-name="P18"><text:span text:style-name="T11">Au lancement du script, juste avant le bloc if __name__ == "__main__":, le thread de surveillance est démarré en arrière-plan :</text:span></text:p>
      <table:table table:name="Tableau16" table:style-name="Tableau16">
        <table:table-column table:style-name="Tableau16.A"/>
        <table:table-row table:style-name="Tableau16.1">
          <table:table-cell table:style-name="Tableau16.A1" office:value-type="string">
            <text:p text:style-name="P25"><text:span text:style-name="T23">threading.Thread(target=check_meds, daemon=True).start()</text:span></text:p>
            <text:p text:style-name="P25"><text:span text:style-name="T23"><text:s/></text:span></text:p>
            <text:p text:style-name="P25"><text:span text:style-name="T23">if __name__ == "__main__":</text:span></text:p>
            <text:p text:style-name="P25"><text:span text:style-name="T23"><text:s text:c="4"/>app.run(debug=True)</text:span></text:p>
          </table:table-cell>
        </table:table-row>
      </table:table>
      <text:p text:style-name="P18"><text:span text:style-name="T11">Le paramètre daemon=True est essentiel : il indique que ce thread doit s'arrêter automatiquement lorsque le programme principal se termine, évitant ainsi qu'un processus orphelin continue de tourner en arrière-plan après la fermeture de l'application. Le mode debug=True active le rechargement automatique du serveur lors de modifications du code, ainsi qu'un débogueur interactif en cas d'erreur — pratique en développement, mais à désactiver dans un contexte de production.</text:span></text:p>
      <text:h text:style-name="Heading_20_2" text:outline-level="2">6.4 Démonstration : exécution du serveur</text:h>
      <text:p text:style-name="P18"><text:span text:style-name="T11">La capture d'écran suivante montre le terminal lors du démarrage et de l'exécution réelle du serveur. On y observe le démarrage de Flask, l'activation du mode debug, le journal des requêtes HTTP (GET /, POST /add) avec leurs codes de statut, ainsi que l'affichage du message « ALERT: aspro » généré par la fonction check_meds() lorsqu'une heure de prise programmée est atteinte.</text:span></text:p>
      <text:p text:style-name="P24"><draw:frame draw:style-name="fr1" draw:name="Image2" text:anchor-type="as-char" svg:width="12.171cm" svg:height="3.545cm" draw:z-index="2"><draw:image xlink:href="Pictures/100000010000041700000132900AE2AF.png" xlink:type="simple" xlink:show="embed" xlink:actuate="onLoad" draw:mime-type="image/png"/><svg:title>Figure</svg:title><svg:desc>Capture d'écran du projet</svg:desc></draw:frame></text:p>
      <text:p text:style-name="P22"><text:span text:style-name="T17">Figure 4 — Journal d'exécution du serveur Flask dans le terminal</text:span></text:p>
      <text:p text:style-name="P18"><text:span text:style-name="T11">On y remarque notamment les lignes de log Flask classiques : l'adresse locale d'écoute (http://127.0.0.1:5000), le PIN du débogueur, ainsi que les requêtes successives correspondant à l'affichage de la page (GET /), au chargement de la feuille de style (GET /static/style.css), et à l'ajout d'un médicament (POST /add) suivi d'une redirection (code 302) vers la page d'accueil (code 200).</text:span></text:p>
      <text:h text:style-name="P20" text:outline-level="1">7. Le système de surveillance et l'alarme sonore</text:h>
      <text:p text:style-name="P18"><text:span text:style-name="T11">Le mécanisme le plus important du projet, du point de vue algorithmique, est la boucle de surveillance continue qui permet au système de fonctionner de façon autonome, sans action de l'utilisateur après l'ajout d'un médicament.</text:span></text:p>
      <text:h text:style-name="Heading_20_2" text:outline-level="2">7.1 La fonction check_meds()</text:h>
      <table:table table:name="Tableau17" table:style-name="Tableau17">
        <table:table-column table:style-name="Tableau17.A"/>
        <table:table-row table:style-name="Tableau17.1">
          <table:table-cell table:style-name="Tableau17.A1" office:value-type="string">
            <text:p text:style-name="P25"><text:span text:style-name="T23">def check_meds():</text:span></text:p>
            <text:p text:style-name="P25"><text:span text:style-name="T23"><text:s text:c="4"/>while True:</text:span></text:p>
            <text:p text:style-name="P25"><text:span text:style-name="T23"><text:s text:c="8"/>meds = load_meds()</text:span></text:p>
            <text:p text:style-name="P25"><text:span text:style-name="T23"><text:s text:c="8"/>now = datetime.now().strftime("%H:%M")</text:span></text:p>
            <text:p text:style-name="P25"><text:span text:style-name="T23"><text:s/></text:span></text:p>
            <text:p text:style-name="P25"><text:span text:style-name="T23"><text:s text:c="8"/>changed = False</text:span></text:p>
            <text:p text:style-name="P25"><text:span text:style-name="T23"><text:s/></text:span></text:p>
            <text:p text:style-name="P25"><text:span text:style-name="T23"><text:s text:c="8"/>for med in meds:</text:span></text:p>
            <text:p text:style-name="P25"><text:span text:style-name="T23"><text:s text:c="12"/>if med["time"] == now and not med.get("sent", False):</text:span></text:p>
            <text:p text:style-name="P25"><text:span text:style-name="T23"><text:s/></text:span></text:p>
            <text:p text:style-name="P25"><text:span text:style-name="T23"><text:s text:c="16"/>print("ALERT:", med["name"])</text:span></text:p>
            <text:p text:style-name="P25"><text:span text:style-name="T23"><text:s/></text:span></text:p>
            <text:p text:style-name="P25"><text:span text:style-name="T23"><text:s text:c="16"/>play_alarm()</text:span></text:p>
            <text:p text:style-name="P25"><text:span text:style-name="T23"><text:s/></text:span></text:p>
            <text:p text:style-name="P25"><text:span text:style-name="T23"><text:s text:c="16"/>send_mail(</text:span></text:p>
            <text:p text:style-name="P25"><text:span text:style-name="T23"><text:s text:c="20"/>subject="💊 Medication Reminder",</text:span></text:p>
            <text:p text:style-name="P25"><text:span text:style-name="T23"><text:s text:c="20"/>body=f"""</text:span></text:p>
            <text:p text:style-name="P25"><text:span text:style-name="T23">MEDICATION ALERT</text:span></text:p>
            <text:p text:style-name="P25"><text:span text:style-name="T23"><text:s/></text:span></text:p>
            <text:p text:style-name="P25"><text:span text:style-name="T23">Name: {med['name']}</text:span></text:p>
            <text:p text:style-name="P25"><text:span text:style-name="T23">Dose: {med['mg']} mg</text:span></text:p>
            <text:p text:style-name="P25"><text:span text:style-name="T23">Time: {med['time']}</text:span></text:p>
            <text:p text:style-name="P25"><text:span text:style-name="T23"><text:s/></text:span></text:p>
            <text:p text:style-name="P25"><text:span text:style-name="T23">Take it now.</text:span></text:p>
            <text:p text:style-name="P25"><text:span text:style-name="T23">"""</text:span></text:p>
            <text:p text:style-name="P25"><text:span text:style-name="T23"><text:s text:c="16"/>)</text:span></text:p>
            <text:p text:style-name="P25"><text:span text:style-name="T23"><text:s/></text:span></text:p>
            <text:p text:style-name="P25"><text:span text:style-name="T23"><text:s text:c="16"/>med["sent"] = True</text:span></text:p>
            <text:p text:style-name="P25"><text:span text:style-name="T23"><text:s text:c="16"/>changed = True</text:span></text:p>
            <text:p text:style-name="P25"><text:span text:style-name="T23"><text:s/></text:span></text:p>
            <text:p text:style-name="P25"><text:span text:style-name="T23"><text:s text:c="8"/>if changed:</text:span></text:p>
            <text:p text:style-name="P25"><text:span text:style-name="T23"><text:s text:c="12"/>save_meds(meds)</text:span></text:p>
            <text:p text:style-name="P25"><text:span text:style-name="T23"><text:s/></text:span></text:p>
            <text:p text:style-name="P25"><text:span text:style-name="T23"><text:s text:c="8"/>time.sleep(30)</text:span></text:p>
          </table:table-cell>
        </table:table-row>
      </table:table>
      <text:p text:style-name="P18"><text:span text:style-name="T11">Cette fonction s'exécute dans une boucle infinie (while True), ce qui est rendu possible sans bloquer le reste de l'application car elle tourne dans un thread séparé. À chaque itération, le déroulement est le suivant :</text:span></text:p>
      <text:list xml:id="list649847499" text:style-name="WWNum3">
        <text:list-item text:start-value="1">
          <text:p text:style-name="P26"><text:soft-page-break/><text:span text:style-name="T24">Rechargement de la liste des médicaments depuis le fichier meds.json, afin de toujours travailler avec les données les plus récentes (y compris les médicaments ajoutés entre deux itérations).</text:span></text:p>
        </text:list-item>
        <text:list-item>
          <text:p text:style-name="P26"><text:span text:style-name="T24">Calcul de l'heure actuelle du système, formatée en chaîne de caractères « HH:MM » grâce à strftime("%H:%M").</text:span></text:p>
        </text:list-item>
        <text:list-item>
          <text:p text:style-name="P26"><text:span text:style-name="T24">Parcours de chaque médicament de la liste, en comparant son champ time à l'heure actuelle.</text:span></text:p>
        </text:list-item>
        <text:list-item>
          <text:p text:style-name="P26"><text:span text:style-name="T24">Si l'heure correspond et que le médicament n'a pas encore été marqué comme envoyé (sent = False), déclenchement de l'alerte : affichage d'un message de log, lecture de l'alarme sonore, et envoi du courriel.</text:span></text:p>
        </text:list-item>
        <text:list-item>
          <text:p text:style-name="P26"><text:span text:style-name="T24">Mise à jour du champ sent à True pour ce médicament, afin d'éviter une nouvelle alerte lors de la prochaine itération.</text:span></text:p>
        </text:list-item>
        <text:list-item>
          <text:p text:style-name="P26"><text:span text:style-name="T24">Si au moins un médicament a été modifié durant cette itération (changed = True), sauvegarde de la liste complète dans le fichier.</text:span></text:p>
        </text:list-item>
        <text:list-item>
          <text:p text:style-name="P26"><text:span text:style-name="T24">Pause de 30 secondes (time.sleep(30)) avant de recommencer le cycle.</text:span></text:p>
        </text:list-item>
      </text:list>
      <text:p text:style-name="P18"><text:span text:style-name="T11">Le choix d'un intervalle de vérification de 30 secondes représente un compromis entre la réactivité du système (un délai plus court détecterait l'heure exacte plus précisément) et la charge sur le processeur et le disque (un délai plus court engendrerait davantage de lectures de fichier). Avec un intervalle de 30 secondes, le système est garanti de détecter une correspondance d'heure dans la même minute, puisque chaque minute dure 60 secondes et que la vérification est effectuée au moins deux fois par minute.</text:span></text:p>
      <text:h text:style-name="Heading_20_2" text:outline-level="2">7.2 La fonction play_alarm()</text:h>
      <table:table table:name="Tableau18" table:style-name="Tableau18">
        <table:table-column table:style-name="Tableau18.A"/>
        <table:table-row table:style-name="Tableau18.1">
          <table:table-cell table:style-name="Tableau18.A1" office:value-type="string">
            <text:p text:style-name="P25"><text:span text:style-name="T23">def play_alarm():</text:span></text:p>
            <text:p text:style-name="P25"><text:span text:style-name="T23"><text:s text:c="4"/>def _play():</text:span></text:p>
            <text:p text:style-name="P25"><text:span text:style-name="T23"><text:s text:c="8"/>playsound("alarm.mp3")</text:span></text:p>
            <text:p text:style-name="P25"><text:span text:style-name="T23"><text:s/></text:span></text:p>
            <text:p text:style-name="P25"><text:span text:style-name="T23"><text:s text:c="4"/>threading.Thread(target=_play, daemon=True).start()</text:span></text:p>
            <text:p text:style-name="P25"><text:span text:style-name="T23"><text:s text:c="4"/>time.sleep(5)</text:span></text:p>
            <text:p text:style-name="P25"><text:span text:style-name="T23"><text:s text:c="4"/># cannot fully stop playsound -&gt; use short mp3 ideally</text:span></text:p>
          </table:table-cell>
        </table:table-row>
      </table:table>
      <text:p text:style-name="P18"><text:span text:style-name="T11">La lecture du son est elle-même déléguée à un thread distinct, ce qui empêche le blocage de la boucle principale de surveillance pendant la durée de lecture du fichier audio. La fonction playsound() de la bibliothèque du même nom se charge d'interagir avec le système audio du système d'exploitation pour jouer le fichier alarm.mp3. Un commentaire dans le code indique une limitation connue : la bibliothèque playsound ne propose pas de méthode native pour interrompre la lecture en cours, d'où la recommandation d'utiliser un fichier audio court.</text:span></text:p>
      <text:h text:style-name="Heading_20_2" text:outline-level="2"><text:soft-page-break/>7.3 Schéma de la boucle de surveillance</text:h>
      <table:table table:name="Tableau19" table:style-name="Tableau19">
        <table:table-column table:style-name="Tableau19.A"/>
        <table:table-row table:style-name="Tableau19.1">
          <table:table-cell table:style-name="Tableau19.A1" office:value-type="string">
            <text:p text:style-name="P21"><text:span text:style-name="T14">Recharger meds.json et obtenir l'heure actuelle (HH:MM)</text:span></text:p>
          </table:table-cell>
        </table:table-row>
        <table:table-row table:style-name="Tableau19.1">
          <table:table-cell table:style-name="Tableau19.A2" office:value-type="string">
            <text:p text:style-name="P21"><text:span text:style-name="T2">↓</text:span></text:p>
          </table:table-cell>
        </table:table-row>
        <table:table-row table:style-name="Tableau19.1">
          <table:table-cell table:style-name="Tableau19.A3" office:value-type="string">
            <text:p text:style-name="P21"><text:span text:style-name="T14">Pour chaque médicament : heure == now et sent == false ?</text:span></text:p>
          </table:table-cell>
        </table:table-row>
        <table:table-row table:style-name="Tableau19.1">
          <table:table-cell table:style-name="Tableau19.A4" office:value-type="string">
            <text:p text:style-name="P21"><text:span text:style-name="T2">↓</text:span></text:p>
          </table:table-cell>
        </table:table-row>
        <table:table-row table:style-name="Tableau19.1">
          <table:table-cell table:style-name="Tableau19.A5" office:value-type="string">
            <text:p text:style-name="P21"><text:span text:style-name="T14">OUI → jouer l'alarme + envoyer le courriel + sent = true</text:span></text:p>
          </table:table-cell>
        </table:table-row>
        <table:table-row table:style-name="Tableau19.1">
          <table:table-cell table:style-name="Tableau19.A6" office:value-type="string">
            <text:p text:style-name="P21"><text:span text:style-name="T2">↓</text:span></text:p>
          </table:table-cell>
        </table:table-row>
        <table:table-row table:style-name="Tableau19.1">
          <table:table-cell table:style-name="Tableau19.A7" office:value-type="string">
            <text:p text:style-name="P21"><text:span text:style-name="T14">Sauvegarder meds.json si une modification a eu lieu</text:span></text:p>
          </table:table-cell>
        </table:table-row>
        <table:table-row table:style-name="Tableau19.1">
          <table:table-cell table:style-name="Tableau19.A8" office:value-type="string">
            <text:p text:style-name="P21"><text:span text:style-name="T2">↓</text:span></text:p>
          </table:table-cell>
        </table:table-row>
        <table:table-row table:style-name="Tableau19.1">
          <table:table-cell table:style-name="Tableau19.A9" office:value-type="string">
            <text:p text:style-name="P21"><text:span text:style-name="T16">Attendre 30 secondes, puis recommencer la boucle</text:span></text:p>
          </table:table-cell>
        </table:table-row>
      </table:table>
      <text:p text:style-name="P22"><text:span text:style-name="T17">Figure 5 — Algorigramme de la boucle de surveillance check_meds()</text:span></text:p>
      <text:h text:style-name="P20" text:outline-level="1">8. Le module d'envoi de courriels (mailer.py)</text:h>
      <text:p text:style-name="P18"><text:span text:style-name="T11">Pour renforcer la fiabilité de la notification (un son d'alarme peut être manqué si l'utilisateur n'est pas à proximité de l'ordinateur), le système envoie également un courriel automatique à chaque déclenchement d'alerte. Cette fonctionnalité est isolée dans un module dédié, mailer.py, ce qui respecte le principe de séparation des responsabilités.</text:span></text:p>
      <text:h text:style-name="Heading_20_2" text:outline-level="2">8.1 Fonctionnement du protocole SMTP utilisé</text:h>
      <text:p text:style-name="P18"><text:span text:style-name="T11">Le module s'appuie sur la bibliothèque standard smtplib pour établir une connexion chiffrée (SSL) avec le serveur SMTP de Gmail (smtp.gmail.com, port 465). Le message est construit à l'aide de la classe MIMEText du module email.mime.text, qui encapsule le sujet, le corps du texte, l'expéditeur et le destinataire dans un format standardisé (MIME) compréhensible par tous les clients de messagerie.</text:span></text:p>
      <table:table table:name="Tableau20" table:style-name="Tableau20">
        <table:table-column table:style-name="Tableau20.A"/>
        <table:table-row table:style-name="Tableau20.1">
          <table:table-cell table:style-name="Tableau20.A1" office:value-type="string">
            <text:p text:style-name="P25"><text:span text:style-name="T23">import smtplib</text:span></text:p>
            <text:p text:style-name="P25"><text:span text:style-name="T23">from email.mime.text import MIMEText</text:span></text:p>
            <text:p text:style-name="P25"><text:span text:style-name="T23"><text:s/></text:span></text:p>
            <text:p text:style-name="P25"><text:span text:style-name="T23">EMAIL = "lasfar.yasir@gmail.com"</text:span></text:p>
            <text:p text:style-name="P25"><text:span text:style-name="T23">PASSWORD = "********"</text:span></text:p>
            <text:p text:style-name="P25"><text:span text:style-name="T23">TO_EMAIL = "yaser.lasfar@gmail.com"</text:span></text:p>
            <text:p text:style-name="P25"><text:span text:style-name="T23"><text:s/></text:span></text:p>
            <text:p text:style-name="P25"><text:span text:style-name="T23">def send_mail(subject, body):</text:span></text:p>
            <text:p text:style-name="P25"><text:span text:style-name="T23"><text:s text:c="4"/>msg = MIMEText(body)</text:span></text:p>
            <text:p text:style-name="P25"><text:span text:style-name="T23"><text:s text:c="4"/>msg["Subject"] = subject</text:span></text:p>
            <text:p text:style-name="P25"><text:span text:style-name="T23"><text:s text:c="4"/>msg["From"] = EMAIL</text:span></text:p>
            <text:p text:style-name="P25"><text:span text:style-name="T23"><text:s text:c="4"/>msg["To"] = TO_EMAIL <text:s/># user email</text:span></text:p>
            <text:p text:style-name="P25"><text:span text:style-name="T23"><text:s/></text:span></text:p>
            <text:p text:style-name="P25"><text:span text:style-name="T23"><text:s text:c="4"/>with smtplib.SMTP_SSL("smtp.gmail.com", 465) as server:</text:span></text:p>
            <text:p text:style-name="P25"><text:span text:style-name="T23"><text:s text:c="8"/>server.login(EMAIL, PASSWORD)</text:span></text:p>
            <text:p text:style-name="P25"><text:span text:style-name="T23"><text:s text:c="8"/>server.send_message(msg)</text:span></text:p>
          </table:table-cell>
        </table:table-row>
      </table:table>
      <text:p text:style-name="P18"><text:span text:style-name="T11">Remarque importante : dans le code source original, le mot de passe utilisé pour l'authentification est un mot de passe d'application Gmail (App Password), généré spécifiquement pour cet usage plutôt que le mot de passe principal du compte. Dans cet extrait, il a été remplacé par des astérisques pour des raisons de sécurité ; cette pratique est discutée plus en détail dans la section consacrée à l'analyse critique du système (section 11).</text:span></text:p>
      <text:h text:style-name="Heading_20_2" text:outline-level="2">8.2 Authentification SMTP avec mot de passe d'application</text:h>
      <text:p text:style-name="P18"><text:span text:style-name="T11">Gmail n'autorise plus, depuis plusieurs années, la connexion via smtplib avec le mot de passe habituel du compte lorsque l'authentification à deux facteurs est activée. Il est nécessaire de générer un « mot de passe d'application » (App Password) à 16 caractères depuis les paramètres de sécurité du compte </text:span><text:soft-page-break/><text:span text:style-name="T11">Google. C'est ce mot de passe spécifique, et non le mot de passe personnel, qui est utilisé dans la variable PASSWORD du module mailer.py.</text:span></text:p>
      <text:h text:style-name="Heading_20_2" text:outline-level="2">8.3 Contenu du courriel généré</text:h>
      <text:p text:style-name="P18"><text:span text:style-name="T11">Le corps du courriel est construit dans app.py à l'aide d'une chaîne formatée (f-string), reprenant les informations du médicament concerné : nom, dosage et heure de prise, accompagnés d'un appel à l'action (« Take it now »). Le sujet du courriel inclut un émoji de gélule (💊) afin de le rendre facilement repérable dans une boîte de réception chargée.</text:span></text:p>
      <text:p text:style-name="P18"><text:span text:style-name="T11">La capture d'écran ci-dessous montre un exemple réel de courriel reçu par le système pour le médicament « Renomicile », avec son dosage (500 mg) et son heure de prise (20:28). On notera que ce courriel a été classé dans le dossier des courriers indésirables (Spam) par Gmail, un point également abordé dans l'analyse critique du projet.</text:span></text:p>
      <text:p text:style-name="P24"><draw:frame draw:style-name="fr1" draw:name="Image3" text:anchor-type="as-char" svg:width="17.604cm" svg:height="7.003cm" draw:z-index="3"><draw:image xlink:href="Pictures/10000001000005B6000002451DBE4096.png" xlink:type="simple" xlink:show="embed" xlink:actuate="onLoad" draw:mime-type="image/png"/><svg:title>Figure</svg:title><svg:desc>Capture d'écran du projet</svg:desc></draw:frame></text:p>
      <text:p text:style-name="P22"><text:span text:style-name="T17">Figure 6 — Courriel de rappel reçu pour le médicament « Renomicile »</text:span></text:p>
      <text:h text:style-name="P20" text:outline-level="1">9. L'interface utilisateur (HTML / CSS)</text:h>
      <text:p text:style-name="P18"><text:span text:style-name="T11">L'interface utilisateur de l'application est volontairement simple et tient sur une seule page (index.html), générée dynamiquement par le moteur Jinja2 intégré à Flask. Elle se compose de trois zones principales : un titre avec icône, un formulaire d'ajout, et un tableau de suivi des médicaments.</text:span></text:p>
      <text:h text:style-name="Heading_20_2" text:outline-level="2">9.1 Structure du template Jinja2</text:h>
      <text:p text:style-name="P18"><text:span text:style-name="T11">Le tableau des médicaments est généré dynamiquement grâce à une boucle Jinja2 qui parcourt la liste meds transmise par la route index(). Pour chaque médicament, une condition {% if med.sent %} détermine si le statut affiché doit être « DONE » (en vert) ou « PENDING » (en jaune) :</text:span></text:p>
      <table:table table:name="Tableau21" table:style-name="Tableau21">
        <table:table-column table:style-name="Tableau21.A"/>
        <table:table-row table:style-name="Tableau21.1">
          <table:table-cell table:style-name="Tableau21.A1" office:value-type="string">
            <text:p text:style-name="P25"><text:span text:style-name="T23">{% for med in meds %}</text:span></text:p>
            <text:p text:style-name="P25"><text:span text:style-name="T23">&lt;tr&gt;</text:span></text:p>
            <text:p text:style-name="P25"><text:span text:style-name="T23"><text:s text:c="4"/>&lt;td&gt;{{ med.name }}&lt;/td&gt;</text:span></text:p>
            <text:p text:style-name="P25"><text:span text:style-name="T23"><text:s text:c="4"/>&lt;td&gt;{{ med.mg }} mg&lt;/td&gt;</text:span></text:p>
            <text:p text:style-name="P25"><text:span text:style-name="T23"><text:s text:c="4"/>&lt;td&gt;{{ med.time }}&lt;/td&gt;</text:span></text:p>
            <text:p text:style-name="P25"><text:span text:style-name="T23"><text:s text:c="4"/>&lt;td&gt;</text:span></text:p>
            <text:p text:style-name="P25"><text:span text:style-name="T23"><text:s text:c="8"/>{% if med.sent %}</text:span></text:p>
            <text:p text:style-name="P25"><text:span text:style-name="T23"><text:s text:c="12"/>&lt;span class="ok"&gt;DONE&lt;/span&gt;</text:span></text:p>
            <text:p text:style-name="P25"><text:span text:style-name="T23"><text:s text:c="8"/>{% else %}</text:span></text:p>
            <text:p text:style-name="P25"><text:span text:style-name="T23"><text:s text:c="12"/>&lt;span class="wait"&gt;PENDING&lt;/span&gt;</text:span></text:p>
            <text:p text:style-name="P25"><text:span text:style-name="T23"><text:s text:c="8"/>{% endif %}</text:span></text:p>
            <text:p text:style-name="P25"><text:span text:style-name="T23"><text:s text:c="4"/>&lt;/td&gt;</text:span></text:p>
            <text:p text:style-name="P25"><text:span text:style-name="T23">&lt;/tr&gt;</text:span></text:p>
            <text:p text:style-name="P25"><text:span text:style-name="T23">{% endfor %}</text:span></text:p>
          </table:table-cell>
        </table:table-row>
      </table:table>
      <text:h text:style-name="Heading_20_2" text:outline-level="2">9.2 Habillage visuel (style.css)</text:h>
      <text:p text:style-name="P18"><text:span text:style-name="T11">La feuille de style applique un fond animé en dégradé de couleurs (du bleu nuit au vert, en passant par le bleu ciel), grâce à une animation CSS keyframes nommée moveBG qui fait évoluer la position du dégradé sur un cycle de 10 secondes. Le tableau bénéficie d'un effet de verre dépoli (glassmorphism), obtenu par une combinaison de transparence (rgba(0,0,0,0.35)) et de flou d'arrière-plan (backdrop-filter: blur(10px)).</text:span></text:p>
      <text:list xml:id="list210707099946029" text:continue-list="list210706903007250" text:style-name="WWNum2">
        <text:list-item>
          <text:p text:style-name="P19"><text:span text:style-name="T12">Couleur verte (#22c55e) pour le statut « DONE » et le bouton d'ajout, symbolisant une action terminée avec succès.</text:span></text:p>
        </text:list-item>
        <text:list-item>
          <text:p text:style-name="P19"><text:span text:style-name="T12">Couleur jaune/orange (#facc15) pour le statut « PENDING », attirant l'attention sur les médicaments encore en attente.</text:span></text:p>
        </text:list-item>
        <text:list-item>
          <text:p text:style-name="P19"><text:span text:style-name="T12">Bordures arrondies (border-radius) appliquées aux champs de saisie, boutons et tableau pour une esthétique moderne et cohérente.</text:span></text:p>
        </text:list-item>
      </text:list>
      <text:h text:style-name="Heading_20_2" text:outline-level="2"><text:soft-page-break/>9.3 Capture d'écran de l'interface en fonctionnement</text:h>
      <text:p text:style-name="P18"><text:span text:style-name="T11">La capture d'écran ci-dessous montre l'interface réelle de l'application, après l'ajout de quatre médicaments dont les alertes ont déjà été déclenchées (statut « DONE » affiché en vert pour chacun).</text:span></text:p>
      <text:p text:style-name="P24"><draw:frame draw:style-name="fr1" draw:name="Image4" text:anchor-type="as-char" svg:width="16.499cm" svg:height="8.287cm" draw:z-index="4"><draw:image xlink:href="Pictures/10000001000006D3000002FFCD936681.png" xlink:type="simple" xlink:show="embed" xlink:actuate="onLoad" draw:mime-type="image/png"/><svg:title>Figure</svg:title><svg:desc>Capture d'écran du projet</svg:desc></draw:frame></text:p>
      <text:p text:style-name="P22"><text:span text:style-name="T17">Figure 7 — Interface du Centre de Contrôle de Médication, avec le tableau de suivi des statuts</text:span></text:p>
      <text:h text:style-name="P20" text:outline-level="1">10. Tests effectués et résultats obtenus</text:h>
      <text:p text:style-name="P18"><text:span text:style-name="T11">Afin de valider le bon fonctionnement de l'application, plusieurs scénarios de test ont été réalisés manuellement en conditions réelles, en ajoutant des médicaments avec des heures de prise proches de l'heure courante, afin d'observer le déclenchement effectif des alertes sans attendre trop longtemps.</text:span></text:p>
      <text:h text:style-name="Heading_20_2" text:outline-level="2">10.1 Scénario de test</text:h>
      <text:list text:continue-list="list649847499" text:style-name="WWNum3">
        <text:list-item>
          <text:p text:style-name="P26"><text:span text:style-name="T24">Démarrage du serveur Flask avec la commande python app.py.</text:span></text:p>
        </text:list-item>
        <text:list-item>
          <text:p text:style-name="P26"><text:span text:style-name="T24">Ouverture du navigateur à l'adresse http://127.0.0.1:5000.</text:span></text:p>
        </text:list-item>
        <text:list-item>
          <text:p text:style-name="P26"><text:span text:style-name="T24">Ajout d'un médicament (par exemple « aspro », 50 mg) avec une heure de prise fixée quelques minutes après l'heure courante.</text:span></text:p>
        </text:list-item>
        <text:list-item>
          <text:p text:style-name="P26"><text:span text:style-name="T24">Attente jusqu'à l'heure programmée, tout en observant le terminal et la boîte de réception du courriel.</text:span></text:p>
        </text:list-item>
        <text:list-item>
          <text:p text:style-name="P26"><text:span text:style-name="T24">Vérification de l'apparition du message « ALERT: aspro » dans le terminal, de la lecture du son d'alarme, et de la réception du courriel.</text:span></text:p>
        </text:list-item>
        <text:list-item>
          <text:p text:style-name="P26"><text:span text:style-name="T24">Rafraîchissement de la page web pour confirmer que le statut est passé de « PENDING » à « DONE ».</text:span></text:p>
        </text:list-item>
      </text:list>
      <text:h text:style-name="Heading_20_2" text:outline-level="2">10.2 Résultats observés</text:h>
      <text:p text:style-name="P18"><text:span text:style-name="T11">Les quatre médicaments visibles dans le tableau de la figure 1 (Dolipran, Surgam, aspro, Renomicile) ont tous été correctement traités par le système : chacun affiche le statut « DONE », confirmant que l'alerte a bien été déclenchée à l'heure programmée pour chacun d'eux. Le journal du terminal (figure 4) confirme cette détection avec le message « ALERT: aspro » apparaissant deux fois consécutivement — un point qui sera discuté dans l'analyse critique ci-après. Le courriel de la figure 6 confirme également la réception effective de la notification par courrier électronique, avec les informations correctes (nom, dose, heure).</text:span></text:p>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Standard"><text:span text:style-name="T19">Médicament</text:span></text:p>
          </table:table-cell>
          <table:table-cell table:style-name="Tableau22.A1" office:value-type="string">
            <text:p text:style-name="Standard"><text:span text:style-name="T19">Dose</text:span></text:p>
          </table:table-cell>
          <table:table-cell table:style-name="Tableau22.A1" office:value-type="string">
            <text:p text:style-name="Standard"><text:span text:style-name="T19">Heure programmée</text:span></text:p>
          </table:table-cell>
          <table:table-cell table:style-name="Tableau22.A1" office:value-type="string">
            <text:p text:style-name="Standard"><text:span text:style-name="T19">Résultat</text:span></text:p>
          </table:table-cell>
        </table:table-row>
        <table:table-row table:style-name="Tableau22.1">
          <table:table-cell table:style-name="Tableau22.A2" office:value-type="string">
            <text:p text:style-name="P11"><text:span text:style-name="T21">Dolipran</text:span></text:p>
          </table:table-cell>
          <table:table-cell table:style-name="Tableau22.B2" office:value-type="string">
            <text:p text:style-name="P21"><text:span text:style-name="T21">88 mg</text:span></text:p>
          </table:table-cell>
          <table:table-cell table:style-name="Tableau22.C2" office:value-type="string">
            <text:p text:style-name="P21"><text:span text:style-name="T21">20:18</text:span></text:p>
          </table:table-cell>
          <table:table-cell table:style-name="Tableau22.D2" office:value-type="string">
            <text:p text:style-name="P11"><text:span text:style-name="T21">Alerte déclenchée — DONE</text:span></text:p>
          </table:table-cell>
        </table:table-row>
        <table:table-row table:style-name="Tableau22.1">
          <table:table-cell table:style-name="Tableau22.A3" office:value-type="string">
            <text:p text:style-name="P11"><text:span text:style-name="T21">Surgam</text:span></text:p>
          </table:table-cell>
          <table:table-cell table:style-name="Tableau22.B3" office:value-type="string">
            <text:p text:style-name="P21"><text:span text:style-name="T21">200 mg</text:span></text:p>
          </table:table-cell>
          <table:table-cell table:style-name="Tableau22.C3" office:value-type="string">
            <text:p text:style-name="P21"><text:span text:style-name="T21">20:22</text:span></text:p>
          </table:table-cell>
          <table:table-cell table:style-name="Tableau22.D3" office:value-type="string">
            <text:p text:style-name="P11"><text:span text:style-name="T21">Alerte déclenchée — DONE</text:span></text:p>
          </table:table-cell>
        </table:table-row>
        <table:table-row table:style-name="Tableau22.1">
          <table:table-cell table:style-name="Tableau22.A4" office:value-type="string">
            <text:p text:style-name="P11"><text:span text:style-name="T21">aspro</text:span></text:p>
          </table:table-cell>
          <table:table-cell table:style-name="Tableau22.B4" office:value-type="string">
            <text:p text:style-name="P21"><text:span text:style-name="T21">50 mg</text:span></text:p>
          </table:table-cell>
          <table:table-cell table:style-name="Tableau22.C4" office:value-type="string">
            <text:p text:style-name="P21"><text:span text:style-name="T21">20:24</text:span></text:p>
          </table:table-cell>
          <table:table-cell table:style-name="Tableau22.D4" office:value-type="string">
            <text:p text:style-name="P11"><text:span text:style-name="T21">Alerte déclenchée — </text:span><text:soft-page-break/><text:span text:style-name="T21">DONE</text:span></text:p>
          </table:table-cell>
        </table:table-row>
        <table:table-row table:style-name="Tableau22.1">
          <table:table-cell table:style-name="Tableau22.A5" office:value-type="string">
            <text:p text:style-name="P11"><text:span text:style-name="T21">Renomicile</text:span></text:p>
          </table:table-cell>
          <table:table-cell table:style-name="Tableau22.B5" office:value-type="string">
            <text:p text:style-name="P21"><text:span text:style-name="T21">500 mg</text:span></text:p>
          </table:table-cell>
          <table:table-cell table:style-name="Tableau22.C5" office:value-type="string">
            <text:p text:style-name="P21"><text:span text:style-name="T21">20:28</text:span></text:p>
          </table:table-cell>
          <table:table-cell table:style-name="Tableau22.D5" office:value-type="string">
            <text:p text:style-name="P11"><text:span text:style-name="T21">Alerte déclenchée — DONE</text:span></text:p>
          </table:table-cell>
        </table:table-row>
      </table:table>
      <text:p text:style-name="P23"/>
      <text:p text:style-name="P22"><text:span text:style-name="T17">Tableau 1 — Récapitulatif des tests effectués sur les quatre médicaments enregistrés</text:span></text:p>
      <text:h text:style-name="Heading_20_2" text:outline-level="2">10.3 Validation des fonctionnalités principales</text:h>
      <text:list text:continue-list="list210707099946029" text:style-name="WWNum2">
        <text:list-item>
          <text:p text:style-name="P19"><text:span text:style-name="T12">✓ Ajout d'un médicament via le formulaire web : fonctionnel.</text:span></text:p>
        </text:list-item>
        <text:list-item>
          <text:p text:style-name="P19"><text:span text:style-name="T12">✓ Persistance des données après redémarrage du serveur (lecture/écriture du fichier JSON) : fonctionnel.</text:span></text:p>
        </text:list-item>
        <text:list-item>
          <text:p text:style-name="P19"><text:span text:style-name="T12">✓ Détection automatique de l'heure de prise par la boucle de surveillance : fonctionnel.</text:span></text:p>
        </text:list-item>
        <text:list-item>
          <text:p text:style-name="P19"><text:span text:style-name="T12">✓ Déclenchement de l'alarme sonore locale : fonctionnel.</text:span></text:p>
        </text:list-item>
        <text:list-item>
          <text:p text:style-name="P19"><text:span text:style-name="T12">✓ Envoi automatique du courriel de rappel : fonctionnel (avec classification en spam par Gmail, voir section 11).</text:span></text:p>
        </text:list-item>
        <text:list-item>
          <text:p text:style-name="P19"><text:span text:style-name="T12">✓ Mise à jour visuelle du statut dans le tableau (PENDING → DONE) : fonctionnel.</text:span></text:p>
        </text:list-item>
      </text:list>
      <text:h text:style-name="P20" text:outline-level="1">1<text:span text:style-name="T25">1</text:span>. Pistes d'amélioration futures</text:h>
      <text:p text:style-name="P18"><text:span text:style-name="T11">Sur la base des limites identifiées dans la section précédente, plusieurs axes d'amélioration peuvent être envisagés pour faire évoluer ce projet vers une solution plus robuste et plus complète.</text:span></text:p>
      <text:h text:style-name="Heading_20_2" text:outline-level="2">1<text:span text:style-name="T25">1</text:span>.1 Gestion de la récurrence quotidienne</text:h>
      <text:p text:style-name="P18"><text:span text:style-name="T11">Ajouter un mécanisme de réinitialisation automatique du champ sent à minuit (ou à une heure fixe chaque jour), afin que les rappels se répètent quotidiennement sans nécessiter de réintroduire manuellement chaque médicament.</text:span></text:p>
      <text:h text:style-name="Heading_20_2" text:outline-level="2">1<text:span text:style-name="T25">1</text:span>.2 Sécurisation des identifiants</text:h>
      <text:p text:style-name="P18"><text:span text:style-name="T11">Déplacer l'adresse email et le mot de passe d'application dans des variables d'environnement, chargées via une bibliothèque comme python-dotenv, et exclure le fichier .env du contrôle de version (via .gitignore).</text:span></text:p>
      <text:h text:style-name="Heading_20_2" text:outline-level="2">1<text:span text:style-name="T25">1</text:span>.3 Migration vers une base de données légère</text:h>
      <text:p text:style-name="P18"><text:span text:style-name="T11">Remplacer le fichier JSON par une base de données SQLite, ce qui apporterait des avantages tels que des requêtes plus efficaces, une meilleure gestion de la concurrence d'accès (plusieurs écritures simultanées), et la possibilité d'ajouter facilement de nouvelles fonctionnalités (historique des prises, statistiques d'observance, etc.).</text:span></text:p>
      <text:h text:style-name="Heading_20_2" text:outline-level="2">1<text:span text:style-name="T25">1</text:span>.4 Interface utilisateur enrichie</text:h>
      <text:list text:continue-numbering="true" text:style-name="WWNum2">
        <text:list-item>
          <text:p text:style-name="P19"><text:span text:style-name="T12">Ajout d'un bouton de suppression ou de modification pour chaque médicament du tableau.</text:span></text:p>
        </text:list-item>
        <text:list-item>
          <text:p text:style-name="P19"><text:span text:style-name="T12">Affichage d'un historique des prises passées, avec horodatage précis de chaque alerte.</text:span></text:p>
        </text:list-item>
        <text:list-item>
          <text:p text:style-name="P19"><text:span text:style-name="T12">Notification visuelle en temps réel (sans rechargement de page) grâce à des technologies comme WebSocket ou des requêtes périodiques en arrière-plan (AJAX).</text:span></text:p>
        </text:list-item>
      </text:list>
      <text:h text:style-name="Heading_20_2" text:outline-level="2">1<text:span text:style-name="T25">1</text:span>.5 Notifications multicanales</text:h>
      <text:p text:style-name="P18"><text:span text:style-name="T11">Intégrer d'autres canaux de notification, comme l'envoi de SMS (via une API telle que Twilio) ou de notifications push sur smartphone, pour des alertes plus difficiles à manquer que le courriel ou le son local.</text:span></text:p>
      <text:h text:style-name="Heading_20_2" text:outline-level="2"><text:soft-page-break/>1<text:span text:style-name="T25">1</text:span>.6 Déploiement en production</text:h>
      <text:p text:style-name="P18"><text:span text:style-name="T11">Remplacer le serveur de développement Flask (non recommandé pour la production, comme l'indique l'avertissement visible dans la figure 4) par un serveur WSGI dédié tel que Gunicorn ou Waitress, et héberger l'application sur un serveur accessible depuis l'extérieur du réseau local, afin que le suivi des médicaments reste actif même lorsque l'ordinateur de développement est éteint.</text:span></text:p>
      <text:h text:style-name="P20" text:outline-level="1">1<text:span text:style-name="T26">2</text:span>. Conclusion</text:h>
      <text:p text:style-name="P18"><text:span text:style-name="T11">Ce projet a permis de concevoir et de mettre en œuvre un système complet de rappel de prise de médicaments, combinant une interface web simple à utiliser et un mécanisme de surveillance autonome capable de détecter automatiquement les échéances et de déclencher des alertes multicanales (sonore et électronique). Au-delà de l'aspect purement fonctionnel, ce travail a été l'occasion d'appliquer concrètement plusieurs concepts fondamentaux abordés dans le module de Méthodes Numériques et dans la filière SEIT : la manipulation de structures de données, la programmation concurrente avec les threads, la communication réseau via le protocole SMTP, ainsi que le développement d'une application web complète, du serveur jusqu'à l'interface graphique.</text:span></text:p>
      <text:p text:style-name="P18"><text:span text:style-name="T11">Les tests effectués en conditions réelles, illustrés par les captures d'écran présentées dans ce rapport, confirment que les fonctionnalités essentielles du système fonctionnent comme prévu : l'ajout de médicaments, leur stockage persistant, la détection automatique des horaires de prise, ainsi que le déclenchement effectif des alertes sonores et par courriel. L'analyse critique menée dans ce rapport a néanmoins permis d'identifier plusieurs axes d'amélioration légitimes — en particulier la gestion de la récurrence quotidienne et la sécurisation des identifiants de messagerie — qui constituent des perspectives intéressantes pour une future évolution de ce projet.</text:span></text:p>
      <text:p text:style-name="P18"><text:span text:style-name="T11">En définitive, ce Centre de Contrôle de Médication démontre qu'il est possible, avec des outils relativement simples (Python, Flask, JSON) et sans infrastructure complexe, de construire un outil utile et fonctionnel répondant à un véritable besoin de santé publique : aider les patients à respecter leur traitement médical.</text:span></text:p>
      <text:p text:style-name="P27"/>
      <text:p text:style-name="P28"/>
      <text:p text:style-name="P21"><text:span text:style-name="T3">— Fin du rapport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1f2937" loext:opacity="100%" style:font-name="Calibri" fo:font-size="11.5pt" fo:language="fr" fo:country="FR" style:letter-kerning="false" style:font-name-asian="Calibri2" style:font-size-asian="11.5pt" style:language-asian="zh" style:country-asian="CN" style:font-name-complex="Calibri2" style:font-size-complex="11.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fo:color="#1f2937" loext:opacity="100%" style:font-name="Calibri" fo:font-size="11.5pt" fo:language="fr" fo:country="FR" style:letter-kerning="false" style:font-name-asian="Calibri2" style:font-size-asian="11.5pt" style:language-asian="zh" style:country-asian="CN" style:font-name-complex="Calibri2" style:font-size-complex="11.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cm" fo:margin-bottom="0.494cm" style:contextual-spacing="false" fo:padding-left="0cm" fo:padding-right="0cm" fo:padding-top="0cm" fo:padding-bottom="0.141cm" fo:border-left="none" fo:border-right="none" fo:border-top="none" fo:border-bottom="0.99pt solid #0ea5e9"/>
      <style:text-properties fo:color="#0ea5e9" loext:opacity="100%" style:font-name="Calibri1" fo:font-family="Calibri" style:font-family-generic="swiss" style:font-pitch="variable" fo:font-size="17pt" fo:font-weight="bold" style:font-name-asian="Calibri2" style:font-family-asian="Calibri" style:font-family-generic-asian="system" style:font-pitch-asian="variable" style:font-size-asian="17pt" style:font-weight-asian="bold" style:font-name-complex="Calibri2" style:font-family-complex="Calibri" style:font-family-generic-complex="system" style:font-pitch-complex="variable" style:font-size-complex="17pt" style:font-weight-complex="bold"/>
    </style:style>
    <style:style style:name="Heading_20_2" style:display-name="Heading 2" style:family="paragraph" style:parent-style-name="Heading" style:default-outline-level="2" style:list-style-name="" style:class="chapter">
      <style:paragraph-properties fo:margin-top="0.564cm" fo:margin-bottom="0.318cm" style:contextual-spacing="false"/>
      <style:text-properties fo:color="#0f172a" loext:opacity="100%" style:font-name="Calibri1" fo:font-family="Calibri" style:font-family-generic="swiss" style:font-pitch="variable" fo:font-size="13.5pt" fo:font-weight="bold" style:font-name-asian="Calibri2" style:font-family-asian="Calibri" style:font-family-generic-asian="system" style:font-pitch-asian="variable" style:font-size-asian="13.5pt" style:font-weight-asian="bold" style:font-name-complex="Calibri2" style:font-family-complex="Calibri" style:font-family-generic-complex="system" style:font-pitch-complex="variable" style:font-size-complex="13.5pt" style:font-weight-complex="bold"/>
    </style:style>
    <style:style style:name="Heading_20_3" style:display-name="Heading 3" style:family="paragraph" style:parent-style-name="Heading" style:default-outline-level="3" style:list-style-name="" style:class="chapter">
      <style:paragraph-properties fo:margin-top="0.388cm" fo:margin-bottom="0.247cm" style:contextual-spacing="false"/>
      <style:text-properties fo:color="#22c55e" loext:opacity="100%" style:font-name="Calibri1" fo:font-family="Calibri" style:font-family-generic="swiss" style:font-pitch="variable" fo:font-size="12pt" fo:font-weight="bold" style:font-name-asian="Calibri2" style:font-family-asian="Calibri" style:font-family-generic-asian="system" style:font-pitch-asian="variable" style:font-size-asian="12pt" style:font-weight-asian="bold" style:font-name-complex="Calibri2" style:font-family-complex="Calibri"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494cm" fo:margin-left="0.988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494cm" fo:margin-left="1.764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2" loext:num-list-format="%1%." style:num-suffix="." style:num-format="1">
        <style:list-level-properties text:list-level-position-and-space-mode="label-alignment">
          <style:list-level-label-alignment text:label-followed-by="listtab" fo:text-indent="-0.494cm" fo:margin-left="0.988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style:tab-stops>
          <style:tab-stop style:position="15.921cm" style:type="right"/>
        </style:tab-stops>
      </style:paragraph-properties>
    </style:style>
    <style:style style:name="MP2" style:family="paragraph" style:parent-style-name="Standard">
      <style:paragraph-properties fo:text-align="center" style:justify-single-word="false"/>
    </style:style>
    <style:style style:name="MT1" style:family="text">
      <style:text-properties fo:color="#6b7280" loext:opacity="100%" fo:font-size="9pt" style:font-size-asian="9pt" style:font-size-complex="9pt"/>
    </style:style>
    <style:style style:name="MT2" style:family="text">
      <style:text-properties fo:color="#6b7280" loext:opacity="100%" fo:font-size="9pt" officeooo:rsid="000be1b0" style:font-size-asian="9pt" style:font-size-complex="9pt"/>
    </style:style>
    <style:style style:name="MT3" style:family="text">
      <style:text-properties fo:color="#6b7280" loext:opacity="100%" fo:font-size="11pt" fo:font-style="italic" style:font-size-asian="11pt" style:font-style-asian="italic" style:font-size-complex="11pt" style:font-style-complex="italic"/>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Centre de Contrôle de Médication<text:tab/>Projet SEIT — Méthodes Numériques</text:span></text:p>
      </style:header>
      <style:footer>
        <text:p text:style-name="MP2"><text:span text:style-name="MT1">Page </text:span><text:page-number text:select-page="current">3</text:page-number><text:span text:style-name="MT1"><text:s/>/ </text:span><text:page-count>27</text:page-count></text:p>
      </style:footer>
    </style:master-page>
    <style:master-page style:name="Converted2" style:page-layout-name="Mpm2" draw:style-name="Mdp1">
      <style:header>
        <text:p text:style-name="MP1"><text:span text:style-name="MT1">Centre de Contrôle de Médication<text:tab/>Projet SEIT — Méthodes Numériques </text:span><text:span text:style-name="MT2">et outiles de simulation</text:span></text:p>
      </style:header>
      <style:footer>
        <text:p text:style-name="MP2"><text:span text:style-name="MT1">Page </text:span><text:span text:style-name="MT3"><text:page-number text:select-page="current">27</text:page-number></text:span><text:span text:style-name="MT1"><text:s/>/ </text:span><text:span text:style-name="MT3"><text:page-count>2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Rapport de Projet — Centre de Contrôle de Médication</dc:title>
    <meta:initial-creator>Yasir Lasfar</meta:initial-creator>
    <meta:editing-cycles>2</meta:editing-cycles>
    <meta:creation-date>2026-06-19T19:44:42.188000000</meta:creation-date>
    <dc:date>2026-06-19T21:07:05.355565600</dc:date>
    <meta:print-date>2026-06-19T21:06:11.834811200</meta:print-date>
    <meta:printed-by>Fichiers PDF</meta:printed-by>
    <meta:editing-duration>PT53S</meta:editing-duration>
    <meta:document-statistic meta:table-count="22" meta:image-count="5" meta:object-count="0" meta:page-count="27" meta:paragraph-count="421" meta:word-count="5239" meta:character-count="35207" meta:non-whitespace-character-count="29634"/>
    <meta:generator>LibreOffice/25.8.7.3$Windows_X86_64 LibreOffice_project/30742500f2d3eb4366ac312fa33d3dcabdb3eba5</meta:generator>
  </office:meta>
</office:document-meta>
</file>